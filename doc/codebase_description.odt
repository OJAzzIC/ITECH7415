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57C00000808898EB195.png" manifest:media-type="image/png"/>
  <manifest:file-entry manifest:full-path="Pictures/100000010000030300000119145411AC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StarSymbol" svg:font-family="StarSymbol"/>
  </office:font-face-decls>
  <office:automatic-styles>
    <style:style style:name="Table1" style:family="table">
      <style:table-properties style:width="19.001cm" fo:margin-top="0cm" fo:margin-bottom="0.199cm" table:align="margins"/>
    </style:style>
    <style:style style:name="Table1.A" style:family="table-column">
      <style:table-column-properties style:column-width="3.854cm" style:rel-column-width="13293*"/>
    </style:style>
    <style:style style:name="Table1.B" style:family="table-column">
      <style:table-column-properties style:column-width="8.232cm" style:rel-column-width="28393*"/>
    </style:style>
    <style:style style:name="Table1.C" style:family="table-column">
      <style:table-column-properties style:column-width="6.914cm" style:rel-column-width="23849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49cm" fo:border="0.05pt solid #000000"/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55cm" style:rel-column-width="32937*"/>
    </style:style>
    <style:style style:name="Table2.B" style:family="table-column">
      <style:table-column-properties style:column-width="1.87cm" style:rel-column-width="6448*"/>
    </style:style>
    <style:style style:name="Table2.C" style:family="table-column">
      <style:table-column-properties style:column-width="7.581cm" style:rel-column-width="26150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49cm" fo:border="0.05pt solid #000000"/>
    </style:style>
    <style:style style:name="Table2.A2" style:family="table-cell">
      <style:table-cell-properties fo:padding="0.049cm" fo:border-left="0.05pt solid #000000" fo:border-right="none" fo:border-top="none" fo:border-bottom="0.05pt solid #000000"/>
    </style:style>
    <style:style style:name="Table2.C2" style:family="table-cell">
      <style:table-cell-properties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16cm" style:rel-column-width="23507*"/>
    </style:style>
    <style:style style:name="Table3.B" style:family="table-column">
      <style:table-column-properties style:column-width="12.185cm" style:rel-column-width="42028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49cm" fo:border="0.05pt solid #000000"/>
    </style:style>
    <style:style style:name="Table3.A2" style:family="table-cell">
      <style:table-cell-properties fo:padding="0.049cm" fo:border-left="0.05pt solid #000000" fo:border-right="none" fo:border-top="none" fo:border-bottom="0.05pt solid #000000"/>
    </style:style>
    <style:style style:name="Table3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4" style:family="table">
      <style:table-properties style:width="18.999cm" fo:margin-top="0cm" fo:margin-bottom="0.199cm" table:align="left"/>
    </style:style>
    <style:style style:name="Table4.A" style:family="table-column">
      <style:table-column-properties style:column-width="5.592cm"/>
    </style:style>
    <style:style style:name="Table4.B" style:family="table-column">
      <style:table-column-properties style:column-width="1.304cm"/>
    </style:style>
    <style:style style:name="Table4.C" style:family="table-column">
      <style:table-column-properties style:column-width="1.561cm"/>
    </style:style>
    <style:style style:name="Table4.D" style:family="table-column">
      <style:table-column-properties style:column-width="2.963cm"/>
    </style:style>
    <style:style style:name="Table4.E" style:family="table-column">
      <style:table-column-properties style:column-width="7.579cm"/>
    </style:style>
    <style:style style:name="Table4.A1" style:family="table-cell">
      <style:table-cell-properties fo:padding="0cm" fo:border-left="0.05pt solid #000000" fo:border-right="none" fo:border-top="0.05pt solid #000000" fo:border-bottom="0.05pt solid #000000"/>
    </style:style>
    <style:style style:name="Table4.E1" style:family="table-cell">
      <style:table-cell-properties fo:padding="0cm" fo:border="0.05pt solid #000000"/>
    </style:style>
    <style:style style:name="Table4.A2" style:family="table-cell">
      <style:table-cell-properties fo:padding="0cm" fo:border-left="0.05pt solid #000000" fo:border-right="none" fo:border-top="none" fo:border-bottom="0.05pt solid #000000"/>
    </style:style>
    <style:style style:name="Table4.E2" style:family="table-cell">
      <style:table-cell-properties fo:padding="0cm" fo:border-left="0.05pt solid #000000" fo:border-right="0.05pt solid #000000" fo:border-top="none" fo:border-bottom="0.05pt solid #000000"/>
    </style:style>
    <style:style style:name="Table5" style:family="table">
      <style:table-properties style:width="19.001cm" fo:break-before="auto" fo:break-after="auto" table:align="margins"/>
    </style:style>
    <style:style style:name="Table5.A" style:family="table-column">
      <style:table-column-properties style:column-width="3.103cm" style:rel-column-width="10701*"/>
    </style:style>
    <style:style style:name="Table5.B" style:family="table-column">
      <style:table-column-properties style:column-width="6.609cm" style:rel-column-width="22796*"/>
    </style:style>
    <style:style style:name="Table5.C" style:family="table-column">
      <style:table-column-properties style:column-width="9.289cm" style:rel-column-width="32038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49cm" fo:border="0.05pt solid #000000"/>
    </style:style>
    <style:style style:name="Table5.A2" style:family="table-cell">
      <style:table-cell-properties fo:padding="0.049cm" fo:border-left="0.05pt solid #000000" fo:border-right="none" fo:border-top="none" fo:border-bottom="0.05pt solid #000000"/>
    </style:style>
    <style:style style:name="Table5.C2" style:family="table-cell">
      <style:table-cell-properties fo:padding="0.049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6.163cm" style:rel-column-width="21256*"/>
    </style:style>
    <style:style style:name="Table6.B" style:family="table-column">
      <style:table-column-properties style:column-width="2.314cm" style:rel-column-width="7981*"/>
    </style:style>
    <style:style style:name="Table6.C" style:family="table-column">
      <style:table-column-properties style:column-width="10.523cm" style:rel-column-width="36298*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49cm" fo:border="0.05pt solid #000000"/>
    </style:style>
    <style:style style:name="Table6.A2" style:family="table-cell">
      <style:table-cell-properties fo:padding="0.049cm" fo:border-left="0.05pt solid #000000" fo:border-right="none" fo:border-top="none" fo:border-bottom="0.05pt solid #000000"/>
    </style:style>
    <style:style style:name="Table6.C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4.748cm" style:rel-column-width="16377*"/>
    </style:style>
    <style:style style:name="Table7.B" style:family="table-column">
      <style:table-column-properties style:column-width="4.75cm" style:rel-column-width="16383*"/>
    </style:style>
    <style:style style:name="Table7.D" style:family="table-column">
      <style:table-column-properties style:column-width="4.752cm" style:rel-column-width="16392*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none" fo:border-top="none" fo:border-bottom="0.05pt solid #000000"/>
    </style:style>
    <style:style style:name="Table7.D2" style:family="table-cell">
      <style:table-cell-properties fo:padding="0.049cm" fo:border-left="0.05pt solid #000000" fo:border-right="0.05pt solid #000000" fo:border-top="none" fo:border-bottom="0.05pt solid #000000"/>
    </style:style>
    <style:style style:name="Table8" style:family="table">
      <style:table-properties style:width="19.001cm" fo:margin-top="0cm" fo:margin-bottom="0.199cm" table:align="margins"/>
    </style:style>
    <style:style style:name="Table8.A" style:family="table-column">
      <style:table-column-properties style:column-width="9.5cm" style:rel-column-width="32767*"/>
    </style:style>
    <style:style style:name="Table8.B" style:family="table-column">
      <style:table-column-properties style:column-width="9.5cm" style:rel-column-width="32768*"/>
    </style:style>
    <style:style style:name="Table8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49cm" fo:border="0.05pt solid #000000"/>
    </style:style>
    <style:style style:name="Table8.A2" style:family="table-cell">
      <style:table-cell-properties fo:padding="0.049cm" fo:border-left="0.05pt solid #000000" fo:border-right="none" fo:border-top="none" fo:border-bottom="0.05pt solid #000000"/>
    </style:style>
    <style:style style:name="Table8.B2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9.4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8.9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8.4cm" style:type="right" style:leader-style="dotted" style:leader-text="."/>
        </style:tab-stops>
      </style:paragraph-properties>
    </style:style>
    <style:style style:name="P4" style:family="paragraph" style:parent-style-name="Heading_20_1" style:master-page-name="">
      <style:paragraph-properties style:page-number="auto" fo:break-before="page"/>
    </style:style>
    <style:style style:name="P5" style:family="paragraph" style:parent-style-name="Text_20_body">
      <style:text-properties officeooo:paragraph-rsid="00062ff5"/>
    </style:style>
    <style:style style:name="P6" style:family="paragraph" style:parent-style-name="Heading_20_1">
      <style:text-properties officeooo:paragraph-rsid="00062ff5"/>
    </style:style>
    <style:style style:name="P7" style:family="paragraph" style:parent-style-name="Preformatted_20_Text" style:master-page-name="">
      <style:paragraph-properties fo:margin-left="0.499cm" style:page-number="auto"/>
      <style:text-properties officeooo:paragraph-rsid="0009a423"/>
    </style:style>
    <style:style style:name="P8" style:family="paragraph" style:parent-style-name="Preformatted_20_Text">
      <style:paragraph-properties fo:margin-left="0.499cm"/>
      <style:text-properties officeooo:paragraph-rsid="0009a423"/>
    </style:style>
    <style:style style:name="P9" style:family="paragraph" style:parent-style-name="Preformatted_20_Text">
      <style:paragraph-properties fo:margin-left="0.499cm"/>
      <style:text-properties officeooo:paragraph-rsid="0035a20b"/>
    </style:style>
    <style:style style:name="P10" style:family="paragraph" style:parent-style-name="Preformatted_20_Text" style:master-page-name="">
      <style:paragraph-properties fo:margin-left="0.499cm" style:page-number="auto" fo:keep-with-next="auto"/>
      <style:text-properties officeooo:paragraph-rsid="0009a423"/>
    </style:style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1" style:master-page-name="">
      <style:paragraph-properties fo:margin-top="0cm" fo:margin-bottom="0cm" style:contextual-spacing="false" style:page-number="auto" fo:keep-with-next="auto"/>
    </style:style>
    <style:style style:name="P13" style:family="paragraph" style:parent-style-name="Heading_20_2" style:master-page-name="">
      <style:paragraph-properties style:page-number="auto" fo:break-before="auto" fo:break-after="auto"/>
    </style:style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P16" style:family="paragraph" style:parent-style-name="Heading_20_1" style:master-page-name="">
      <style:paragraph-properties style:page-number="auto" fo:break-before="auto" fo:break-after="auto"/>
    </style:style>
    <style:style style:name="P17" style:family="paragraph" style:parent-style-name="Table_20_Heading">
      <style:text-properties officeooo:paragraph-rsid="000cf3de"/>
    </style:style>
    <style:style style:name="P18" style:family="paragraph" style:parent-style-name="Table_20_Contents">
      <style:text-properties officeooo:paragraph-rsid="000cf3de"/>
    </style:style>
    <style:style style:name="P19" style:family="paragraph" style:parent-style-name="Table_20_Contents">
      <style:text-properties officeooo:rsid="000cf3de" officeooo:paragraph-rsid="000cf3de"/>
    </style:style>
    <style:style style:name="P20" style:family="paragraph" style:parent-style-name="Text_20_body">
      <style:text-properties officeooo:paragraph-rsid="000cf3de"/>
    </style:style>
    <style:style style:name="P21" style:family="paragraph" style:parent-style-name="Text_20_body" style:list-style-name="L4">
      <style:paragraph-properties fo:margin-top="0cm" fo:margin-bottom="0cm" style:contextual-spacing="false"/>
    </style:style>
    <style:style style:name="P22" style:family="paragraph" style:parent-style-name="Text_20_body" style:list-style-name="L4"/>
    <style:style style:name="P23" style:family="paragraph" style:parent-style-name="Text_20_body" style:list-style-name="L5">
      <style:paragraph-properties fo:margin-top="0cm" fo:margin-bottom="0cm" style:contextual-spacing="false"/>
    </style:style>
    <style:style style:name="P24" style:family="paragraph" style:parent-style-name="Text_20_body" style:list-style-name="L6">
      <style:paragraph-properties fo:margin-top="0cm" fo:margin-bottom="0cm" style:contextual-spacing="false"/>
    </style:style>
    <style:style style:name="P25" style:family="paragraph" style:parent-style-name="Text_20_body" style:list-style-name="L7">
      <style:paragraph-properties fo:margin-top="0cm" fo:margin-bottom="0cm" style:contextual-spacing="false"/>
    </style:style>
    <style:style style:name="P26" style:family="paragraph" style:parent-style-name="Text_20_body" style:list-style-name="L6">
      <style:paragraph-properties fo:margin-top="0cm" fo:margin-bottom="0cm" style:contextual-spacing="false"/>
      <style:text-properties officeooo:paragraph-rsid="0038165f"/>
    </style:style>
    <style:style style:name="P27" style:family="paragraph" style:parent-style-name="Text_20_body" style:list-style-name="L8">
      <style:paragraph-properties fo:margin-top="0cm" fo:margin-bottom="0cm" style:contextual-spacing="false"/>
      <style:text-properties officeooo:paragraph-rsid="0038165f"/>
    </style:style>
    <style:style style:name="P28" style:family="paragraph" style:parent-style-name="Text_20_body" style:list-style-name="L9">
      <style:paragraph-properties fo:margin-top="0cm" fo:margin-bottom="0cm" style:contextual-spacing="false"/>
    </style:style>
    <style:style style:name="P29" style:family="paragraph" style:parent-style-name="Text_20_body">
      <style:text-properties officeooo:paragraph-rsid="001d218a"/>
    </style:style>
    <style:style style:name="P30" style:family="paragraph" style:parent-style-name="Heading_20_3">
      <style:text-properties officeooo:paragraph-rsid="00122b2a"/>
    </style:style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1">
      <style:paragraph-properties fo:margin-top="0cm" fo:margin-bottom="0cm" style:contextual-spacing="false"/>
    </style:style>
    <style:style style:name="P33" style:family="paragraph" style:parent-style-name="Text_20_body" style:list-style-name="L12">
      <style:paragraph-properties fo:margin-top="0cm" fo:margin-bottom="0cm" style:contextual-spacing="false"/>
    </style:style>
    <style:style style:name="P34" style:family="paragraph" style:parent-style-name="Text_20_body">
      <style:text-properties officeooo:paragraph-rsid="0017b280"/>
    </style:style>
    <style:style style:name="P35" style:family="paragraph" style:parent-style-name="Text_20_body" style:list-style-name="L13">
      <style:paragraph-properties fo:margin-top="0cm" fo:margin-bottom="0cm" style:contextual-spacing="false"/>
      <style:text-properties officeooo:paragraph-rsid="0017b280"/>
    </style:style>
    <style:style style:name="P36" style:family="paragraph" style:parent-style-name="Text_20_body" style:list-style-name="L14">
      <style:paragraph-properties fo:margin-top="0cm" fo:margin-bottom="0cm" style:contextual-spacing="false"/>
      <style:text-properties officeooo:paragraph-rsid="0017b280"/>
    </style:style>
    <style:style style:name="P37" style:family="paragraph" style:parent-style-name="Text_20_body" style:list-style-name="L14">
      <style:text-properties officeooo:paragraph-rsid="0017b280"/>
    </style:style>
    <style:style style:name="P38" style:family="paragraph" style:parent-style-name="Text_20_body" style:list-style-name="L15">
      <style:paragraph-properties fo:margin-top="0cm" fo:margin-bottom="0cm" style:contextual-spacing="false"/>
    </style:style>
    <style:style style:name="P39" style:family="paragraph" style:parent-style-name="Text_20_body" style:list-style-name="L15"/>
    <style:style style:name="P40" style:family="paragraph" style:parent-style-name="Text_20_body">
      <style:text-properties officeooo:paragraph-rsid="0019156c"/>
    </style:style>
    <style:style style:name="P41" style:family="paragraph" style:parent-style-name="Text_20_body" style:list-style-name="L16">
      <style:paragraph-properties fo:margin-top="0cm" fo:margin-bottom="0cm" style:contextual-spacing="false"/>
    </style:style>
    <style:style style:name="P42" style:family="paragraph" style:parent-style-name="Text_20_body" style:list-style-name="L16"/>
    <style:style style:name="P43" style:family="paragraph" style:parent-style-name="Text_20_body" style:list-style-name="L17">
      <style:paragraph-properties fo:margin-top="0cm" fo:margin-bottom="0cm" style:contextual-spacing="false"/>
    </style:style>
    <style:style style:name="P44" style:family="paragraph" style:parent-style-name="Text_20_body" style:list-style-name="L17"/>
    <style:style style:name="P45" style:family="paragraph" style:parent-style-name="Text_20_body" style:list-style-name="L18">
      <style:paragraph-properties fo:margin-top="0cm" fo:margin-bottom="0cm" style:contextual-spacing="false"/>
    </style:style>
    <style:style style:name="P46" style:family="paragraph" style:parent-style-name="Text_20_body" style:list-style-name="L19">
      <style:paragraph-properties fo:margin-top="0cm" fo:margin-bottom="0cm" style:contextual-spacing="false"/>
    </style:style>
    <style:style style:name="P47" style:family="paragraph" style:parent-style-name="Text_20_body" style:list-style-name="L19"/>
    <style:style style:name="P48" style:family="paragraph" style:parent-style-name="Text_20_body" style:list-style-name="L20">
      <style:paragraph-properties fo:margin-top="0cm" fo:margin-bottom="0cm" style:contextual-spacing="false"/>
      <style:text-properties officeooo:paragraph-rsid="001ace78"/>
    </style:style>
    <style:style style:name="P49" style:family="paragraph" style:parent-style-name="Text_20_body" style:list-style-name="L20"/>
    <style:style style:name="P50" style:family="paragraph" style:parent-style-name="Text_20_body" style:list-style-name="L21">
      <style:paragraph-properties fo:margin-top="0cm" fo:margin-bottom="0cm" style:contextual-spacing="false"/>
    </style:style>
    <style:style style:name="P51" style:family="paragraph" style:parent-style-name="Text_20_body" style:list-style-name="L22"/>
    <style:style style:name="P52" style:family="paragraph" style:parent-style-name="Text_20_body" style:list-style-name="L22">
      <style:paragraph-properties fo:margin-top="0cm" fo:margin-bottom="0cm" style:contextual-spacing="false"/>
    </style:style>
    <style:style style:name="P53" style:family="paragraph" style:parent-style-name="Text_20_body" style:list-style-name="L23"/>
    <style:style style:name="P54" style:family="paragraph" style:parent-style-name="Text_20_body" style:list-style-name="L23">
      <style:paragraph-properties fo:margin-top="0cm" fo:margin-bottom="0cm" style:contextual-spacing="false"/>
    </style:style>
    <style:style style:name="P55" style:family="paragraph" style:parent-style-name="Text_20_body" style:list-style-name="L24">
      <style:paragraph-properties fo:margin-top="0cm" fo:margin-bottom="0cm" style:contextual-spacing="false"/>
    </style:style>
    <style:style style:name="P56" style:family="paragraph" style:parent-style-name="Text_20_body" style:list-style-name="L25">
      <style:paragraph-properties fo:margin-top="0cm" fo:margin-bottom="0cm" style:contextual-spacing="false"/>
    </style:style>
    <style:style style:name="P57" style:family="paragraph" style:parent-style-name="Heading_20_3">
      <style:text-properties officeooo:paragraph-rsid="003a3db7"/>
    </style:style>
    <style:style style:name="P58" style:family="paragraph" style:parent-style-name="Preformatted_20_Text">
      <style:paragraph-properties fo:text-align="center" style:justify-single-word="false"/>
    </style:style>
    <style:style style:name="P59" style:family="paragraph" style:parent-style-name="Text_20_body" style:list-style-name="L26">
      <style:paragraph-properties fo:margin-top="0cm" fo:margin-bottom="0cm" style:contextual-spacing="false"/>
    </style:style>
    <style:style style:name="P60" style:family="paragraph" style:parent-style-name="Text_20_body" style:list-style-name="L27">
      <style:paragraph-properties fo:margin-top="0cm" fo:margin-bottom="0cm" style:contextual-spacing="false"/>
    </style:style>
    <style:style style:name="P61" style:family="paragraph" style:parent-style-name="Text_20_body" style:list-style-name="L28">
      <style:paragraph-properties fo:margin-top="0cm" fo:margin-bottom="0cm" style:contextual-spacing="false"/>
    </style:style>
    <style:style style:name="P62" style:family="paragraph" style:parent-style-name="Text_20_body" style:list-style-name="L28"/>
    <style:style style:name="P63" style:family="paragraph" style:parent-style-name="Text_20_body">
      <style:text-properties fo:font-weight="bold" style:font-weight-asian="bold" style:font-weight-complex="bold"/>
    </style:style>
    <style:style style:name="P64" style:family="paragraph" style:parent-style-name="Preformatted_20_Text" style:master-page-name="">
      <style:paragraph-properties fo:margin-left="0.499cm" style:page-number="auto"/>
    </style:style>
    <style:style style:name="P65" style:family="paragraph" style:parent-style-name="Preformatted_20_Text">
      <style:paragraph-properties fo:margin-left="0.499cm"/>
    </style:style>
    <style:style style:name="P66" style:family="paragraph" style:parent-style-name="Text_20_body">
      <style:paragraph-properties fo:margin-top="0.3cm" fo:margin-bottom="0.3cm" style:contextual-spacing="false"/>
    </style:style>
    <style:style style:name="P67" style:family="paragraph" style:parent-style-name="Text_20_body" style:list-style-name="L29"/>
    <style:style style:name="P68" style:family="paragraph" style:parent-style-name="Text_20_body" style:list-style-name="L30">
      <style:paragraph-properties fo:margin-top="0cm" fo:margin-bottom="0cm" style:contextual-spacing="false"/>
    </style:style>
    <style:style style:name="P69" style:family="paragraph" style:parent-style-name="Text_20_body" style:list-style-name="L31">
      <style:paragraph-properties fo:margin-top="0cm" fo:margin-bottom="0cm" style:contextual-spacing="false"/>
    </style:style>
    <style:style style:name="P70" style:family="paragraph" style:parent-style-name="Text_20_body" style:list-style-name="L32">
      <style:paragraph-properties fo:margin-top="0cm" fo:margin-bottom="0cm" style:contextual-spacing="false"/>
    </style:style>
    <style:style style:name="P71" style:family="paragraph" style:parent-style-name="Text_20_body" style:list-style-name="L33">
      <style:paragraph-properties fo:margin-top="0cm" fo:margin-bottom="0cm" style:contextual-spacing="false"/>
    </style:style>
    <style:style style:name="P72" style:family="paragraph" style:parent-style-name="Text_20_body" style:list-style-name="L34">
      <style:paragraph-properties fo:margin-top="0cm" fo:margin-bottom="0cm" style:contextual-spacing="false"/>
    </style:style>
    <style:style style:name="P73" style:family="paragraph" style:parent-style-name="Text_20_body" style:list-style-name="L35">
      <style:paragraph-properties fo:margin-top="0cm" fo:margin-bottom="0cm" style:contextual-spacing="false"/>
    </style:style>
    <style:style style:name="P74" style:family="paragraph" style:parent-style-name="Text_20_body" style:list-style-name="L36">
      <style:paragraph-properties fo:margin-top="0cm" fo:margin-bottom="0cm" style:contextual-spacing="false"/>
    </style:style>
    <style:style style:name="P75" style:family="paragraph" style:parent-style-name="Text_20_body">
      <style:text-properties fo:font-weight="bold" officeooo:rsid="000ea77c" officeooo:paragraph-rsid="000ea77c" style:font-weight-asian="bold" style:font-weight-complex="bold"/>
    </style:style>
    <style:style style:name="P76" style:family="paragraph" style:parent-style-name="Text_20_body" style:list-style-name="L37">
      <style:paragraph-properties fo:margin-top="0cm" fo:margin-bottom="0cm" style:contextual-spacing="false"/>
    </style:style>
    <style:style style:name="P77" style:family="paragraph" style:parent-style-name="Text_20_body" style:list-style-name="L38">
      <style:paragraph-properties fo:margin-top="0cm" fo:margin-bottom="0cm" style:contextual-spacing="false"/>
    </style:style>
    <style:style style:name="P78" style:family="paragraph" style:parent-style-name="Text_20_body" style:list-style-name="L38">
      <style:paragraph-properties fo:margin-top="0cm" fo:margin-bottom="0cm" style:contextual-spacing="false"/>
      <style:text-properties officeooo:paragraph-rsid="001b2b1e"/>
    </style:style>
    <style:style style:name="P79" style:family="paragraph" style:parent-style-name="Text_20_body" style:list-style-name="L39">
      <style:paragraph-properties fo:margin-top="0cm" fo:margin-bottom="0cm" style:contextual-spacing="false"/>
    </style:style>
    <style:style style:name="P80" style:family="paragraph" style:parent-style-name="Text_20_body" style:list-style-name="L40">
      <style:paragraph-properties fo:margin-top="0cm" fo:margin-bottom="0cm" style:contextual-spacing="false"/>
    </style:style>
    <style:style style:name="P81" style:family="paragraph" style:parent-style-name="Text_20_body" style:list-style-name="L40"/>
    <style:style style:name="P82" style:family="paragraph" style:parent-style-name="Text_20_body" style:list-style-name="L41">
      <style:paragraph-properties fo:margin-top="0cm" fo:margin-bottom="0cm" style:contextual-spacing="false"/>
    </style:style>
    <style:style style:name="P83" style:family="paragraph" style:parent-style-name="Text_20_body" style:list-style-name="L42">
      <style:paragraph-properties fo:margin-top="0cm" fo:margin-bottom="0cm" style:contextual-spacing="false"/>
    </style:style>
    <style:style style:name="P84" style:family="paragraph" style:parent-style-name="Text_20_body" style:list-style-name="L43">
      <style:paragraph-properties fo:margin-top="0cm" fo:margin-bottom="0cm" style:contextual-spacing="false"/>
    </style:style>
    <style:style style:name="P85" style:family="paragraph" style:parent-style-name="Text_20_body">
      <style:text-properties officeooo:paragraph-rsid="0015278a"/>
    </style:style>
    <style:style style:name="P86" style:family="paragraph" style:parent-style-name="Text_20_body" style:list-style-name="L44">
      <style:paragraph-properties fo:margin-top="0cm" fo:margin-bottom="0cm" style:contextual-spacing="false"/>
    </style:style>
    <style:style style:name="P87" style:family="paragraph" style:parent-style-name="Text_20_body" style:list-style-name="L44"/>
    <style:style style:name="P88" style:family="paragraph" style:parent-style-name="Text_20_body">
      <style:text-properties officeooo:paragraph-rsid="001c0da1"/>
    </style:style>
    <style:style style:name="P89" style:family="paragraph" style:parent-style-name="Text_20_body">
      <style:text-properties fo:font-weight="bold" officeooo:paragraph-rsid="001c0da1" style:font-weight-asian="bold" style:font-weight-complex="bold"/>
    </style:style>
    <style:style style:name="P90" style:family="paragraph" style:parent-style-name="Text_20_body">
      <style:paragraph-properties fo:text-align="center" style:justify-single-word="false"/>
    </style:style>
    <style:style style:name="P91" style:family="paragraph" style:parent-style-name="Text_20_body" style:list-style-name="L45">
      <style:paragraph-properties fo:margin-top="0cm" fo:margin-bottom="0cm" style:contextual-spacing="false"/>
    </style:style>
    <style:style style:name="P92" style:family="paragraph" style:parent-style-name="Text_20_body" style:list-style-name="L46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Mono"/>
    </style:style>
    <style:style style:name="T3" style:family="text">
      <style:text-properties fo:font-weight="bold" officeooo:rsid="00122b2a" style:font-weight-asian="bold" style:font-weight-complex="bold"/>
    </style:style>
    <style:style style:name="T4" style:family="text">
      <style:text-properties officeooo:rsid="0017b280"/>
    </style:style>
    <style:style style:name="T5" style:family="text">
      <style:text-properties officeooo:rsid="0019156c"/>
    </style:style>
    <style:style style:name="T6" style:family="text">
      <style:text-properties officeooo:rsid="001ace78"/>
    </style:style>
    <style:style style:name="T7" style:family="text">
      <style:text-properties officeooo:rsid="001b09a9"/>
    </style:style>
    <style:style style:name="T8" style:family="text">
      <style:text-properties officeooo:rsid="001b2b1e"/>
    </style:style>
    <style:style style:name="T9" style:family="text">
      <style:text-properties fo:font-variant="normal" fo:text-transform="none" fo:color="#b8abbf" loext:opacity="100%" fo:font-family="apple-system, system-ui, 'Segoe WPC', 'Segoe UI', system-ui, Ubuntu, 'Droid Sans', sans-serif" fo:font-size="10.5pt" fo:letter-spacing="normal" fo:font-style="normal" fo:font-weight="normal"/>
    </style:style>
    <style:style style:name="T10" style:family="text">
      <style:text-properties officeooo:rsid="00117e7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408be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198cm">
          <style:column-sep style:width="0.009cm" style:color="#000000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ild Vocabulary Acquisition Simulation – Codebase Description</text:p>
      <text:p text:style-name="Subtitle">Developer Reference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link-start text:style-name="Index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link-start text:style-name="Index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link-start text:style-name="Index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link-start text:style-name="Index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8527_3058386561" office:name="Introduction" text:style-name="Index_20_Link" text:visited-style-name="Index_20_Link">Introduction</text:a><text:tab/><text:a xlink:type="simple" xlink:href="#__RefHeading___Toc8527_3058386561" text:style-name="Index_20_Link" text:visited-style-name="Index_20_Link">2</text:a></text:p>
          <text:p text:style-name="P1"><text:a xlink:type="simple" xlink:href="#__RefHeading___Toc8529_3058386561" office:name="Project Structure" text:style-name="Index_20_Link" text:visited-style-name="Index_20_Link">Project Structure</text:a><text:tab/><text:a xlink:type="simple" xlink:href="#__RefHeading___Toc8529_3058386561" text:style-name="Index_20_Link" text:visited-style-name="Index_20_Link">2</text:a></text:p>
          <text:p text:style-name="P1"><text:a xlink:type="simple" xlink:href="#__RefHeading___Toc8531_3058386561" office:name="Architecture Overview" text:style-name="Index_20_Link" text:visited-style-name="Index_20_Link">Architecture Overview</text:a><text:tab/><text:a xlink:type="simple" xlink:href="#__RefHeading___Toc8531_3058386561" text:style-name="Index_20_Link" text:visited-style-name="Index_20_Link">2</text:a></text:p>
          <text:p text:style-name="P2"><text:a xlink:type="simple" xlink:href="#__RefHeading___Toc8533_3058386561" office:name="JaCaMo Framework" text:style-name="Index_20_Link" text:visited-style-name="Index_20_Link">JaCaMo Framework</text:a><text:tab/><text:a xlink:type="simple" xlink:href="#__RefHeading___Toc8533_3058386561" text:style-name="Index_20_Link" text:visited-style-name="Index_20_Link">2</text:a></text:p>
          <text:p text:style-name="P2"><text:a xlink:type="simple" xlink:href="#__RefHeading___Toc8535_3058386561" office:name="System Architecture Diagram" text:style-name="Index_20_Link" text:visited-style-name="Index_20_Link">System Architecture Diagram</text:a><text:tab/><text:a xlink:type="simple" xlink:href="#__RefHeading___Toc8535_3058386561" text:style-name="Index_20_Link" text:visited-style-name="Index_20_Link">3</text:a></text:p>
          <text:p text:style-name="P1"><text:a xlink:type="simple" xlink:href="#__RefHeading___Toc8537_3058386561" office:name="Build System and Dependencies" text:style-name="Index_20_Link" text:visited-style-name="Index_20_Link">Build System and Dependencies</text:a><text:tab/><text:a xlink:type="simple" xlink:href="#__RefHeading___Toc8537_3058386561" text:style-name="Index_20_Link" text:visited-style-name="Index_20_Link">3</text:a></text:p>
          <text:p text:style-name="P2"><text:a xlink:type="simple" xlink:href="#__RefHeading___Toc8539_3058386561" office:name="Gradle Configuration" text:style-name="Index_20_Link" text:visited-style-name="Index_20_Link">Gradle Configuration</text:a><text:tab/><text:a xlink:type="simple" xlink:href="#__RefHeading___Toc8539_3058386561" text:style-name="Index_20_Link" text:visited-style-name="Index_20_Link">3</text:a></text:p>
          <text:p text:style-name="P2"><text:a xlink:type="simple" xlink:href="#__RefHeading___Toc8541_3058386561" office:name="Dependencies" text:style-name="Index_20_Link" text:visited-style-name="Index_20_Link">Dependencies</text:a><text:tab/><text:a xlink:type="simple" xlink:href="#__RefHeading___Toc8541_3058386561" text:style-name="Index_20_Link" text:visited-style-name="Index_20_Link">3</text:a></text:p>
          <text:p text:style-name="P2"><text:a xlink:type="simple" xlink:href="#__RefHeading___Toc8543_3058386561" office:name="Build Tasks" text:style-name="Index_20_Link" text:visited-style-name="Index_20_Link">Build Tasks</text:a><text:tab/><text:a xlink:type="simple" xlink:href="#__RefHeading___Toc8543_3058386561" text:style-name="Index_20_Link" text:visited-style-name="Index_20_Link">3</text:a></text:p>
          <text:p text:style-name="P1"><text:a xlink:type="simple" xlink:href="#__RefHeading___Toc8545_3058386561" office:name="Configuration System" text:style-name="Index_20_Link" text:visited-style-name="Index_20_Link">Configuration System</text:a><text:tab/><text:a xlink:type="simple" xlink:href="#__RefHeading___Toc8545_3058386561" text:style-name="Index_20_Link" text:visited-style-name="Index_20_Link">3</text:a></text:p>
          <text:p text:style-name="P2"><text:a xlink:type="simple" xlink:href="#__RefHeading___Toc8547_3058386561" office:name="simulation.conf" text:style-name="Index_20_Link" text:visited-style-name="Index_20_Link">simulation.conf</text:a><text:tab/><text:a xlink:type="simple" xlink:href="#__RefHeading___Toc8547_3058386561" text:style-name="Index_20_Link" text:visited-style-name="Index_20_Link">3</text:a></text:p>
          <text:p text:style-name="P2"><text:a xlink:type="simple" xlink:href="#__RefHeading___Toc8549_3058386561" office:name="ConfigFile.java" text:style-name="Index_20_Link" text:visited-style-name="Index_20_Link">ConfigFile.java</text:a><text:tab/><text:a xlink:type="simple" xlink:href="#__RefHeading___Toc8549_3058386561" text:style-name="Index_20_Link" text:visited-style-name="Index_20_Link">4</text:a></text:p>
          <text:p text:style-name="P2"><text:a xlink:type="simple" xlink:href="#__RefHeading___Toc8551_3058386561" office:name="Supporting Classes" text:style-name="Index_20_Link" text:visited-style-name="Index_20_Link">Supporting Classes</text:a><text:tab/><text:a xlink:type="simple" xlink:href="#__RefHeading___Toc8551_3058386561" text:style-name="Index_20_Link" text:visited-style-name="Index_20_Link">4</text:a></text:p>
          <text:p text:style-name="P1"><text:a xlink:type="simple" xlink:href="#__RefHeading___Toc8553_3058386561" office:name="Custom Launcher" text:style-name="Index_20_Link" text:visited-style-name="Index_20_Link">Custom Launcher</text:a><text:tab/><text:a xlink:type="simple" xlink:href="#__RefHeading___Toc8553_3058386561" text:style-name="Index_20_Link" text:visited-style-name="Index_20_Link">4</text:a></text:p>
          <text:p text:style-name="P2"><text:a xlink:type="simple" xlink:href="#__RefHeading___Toc8555_3058386561" office:name="VocabLauncher.java" text:style-name="Index_20_Link" text:visited-style-name="Index_20_Link">VocabLauncher.java</text:a><text:tab/><text:a xlink:type="simple" xlink:href="#__RefHeading___Toc8555_3058386561" text:style-name="Index_20_Link" text:visited-style-name="Index_20_Link">4</text:a></text:p>
          <text:p text:style-name="P3"><text:a xlink:type="simple" xlink:href="#__RefHeading___Toc8557_3058386561" office:name="Startup sequence within createAgs():" text:style-name="Index_20_Link" text:visited-style-name="Index_20_Link">Startup sequence within createAgs():</text:a><text:tab/><text:a xlink:type="simple" xlink:href="#__RefHeading___Toc8557_3058386561" text:style-name="Index_20_Link" text:visited-style-name="Index_20_Link">5</text:a></text:p>
          <text:p text:style-name="P3"><text:a xlink:type="simple" xlink:href="#__RefHeading___Toc8559_3058386561" office:name="Key design note:" text:style-name="Index_20_Link" text:visited-style-name="Index_20_Link">Key design note:</text:a><text:tab/><text:a xlink:type="simple" xlink:href="#__RefHeading___Toc8559_3058386561" text:style-name="Index_20_Link" text:visited-style-name="Index_20_Link">5</text:a></text:p>
          <text:p text:style-name="P1"><text:a xlink:type="simple" xlink:href="#__RefHeading___Toc8561_3058386561" office:name="Agent Layer (Jason / AgentSpeak)" text:style-name="Index_20_Link" text:visited-style-name="Index_20_Link">Agent Layer (Jason / AgentSpeak)</text:a><text:tab/><text:a xlink:type="simple" xlink:href="#__RefHeading___Toc8561_3058386561" text:style-name="Index_20_Link" text:visited-style-name="Index_20_Link">5</text:a></text:p>
          <text:p text:style-name="P2"><text:a xlink:type="simple" xlink:href="#__RefHeading___Toc8563_3058386561" office:name="Common Includes" text:style-name="Index_20_Link" text:visited-style-name="Index_20_Link">Common Includes</text:a><text:tab/><text:a xlink:type="simple" xlink:href="#__RefHeading___Toc8563_3058386561" text:style-name="Index_20_Link" text:visited-style-name="Index_20_Link">5</text:a></text:p>
          <text:p text:style-name="P3"><text:a xlink:type="simple" xlink:href="#__RefHeading___Toc8565_3058386561" office:name="common.asl" text:style-name="Index_20_Link" text:visited-style-name="Index_20_Link">common.asl</text:a><text:tab/><text:a xlink:type="simple" xlink:href="#__RefHeading___Toc8565_3058386561" text:style-name="Index_20_Link" text:visited-style-name="Index_20_Link">5</text:a></text:p>
          <text:p text:style-name="P3"><text:a xlink:type="simple" xlink:href="#__RefHeading___Toc8567_3058386561" office:name="child_common.asl" text:style-name="Index_20_Link" text:visited-style-name="Index_20_Link">child_common.asl</text:a><text:tab/><text:a xlink:type="simple" xlink:href="#__RefHeading___Toc8567_3058386561" text:style-name="Index_20_Link" text:visited-style-name="Index_20_Link">5</text:a></text:p>
          <text:p text:style-name="P3"><text:a xlink:type="simple" xlink:href="#__RefHeading___Toc8569_3058386561" office:name="adult_common.asl" text:style-name="Index_20_Link" text:visited-style-name="Index_20_Link">adult_common.asl</text:a><text:tab/><text:a xlink:type="simple" xlink:href="#__RefHeading___Toc8569_3058386561" text:style-name="Index_20_Link" text:visited-style-name="Index_20_Link">6</text:a></text:p>
          <text:p text:style-name="P2"><text:a xlink:type="simple" xlink:href="#__RefHeading___Toc8571_3058386561" office:name="Child Agent" text:style-name="Index_20_Link" text:visited-style-name="Index_20_Link">Child Agent</text:a><text:tab/><text:a xlink:type="simple" xlink:href="#__RefHeading___Toc8571_3058386561" text:style-name="Index_20_Link" text:visited-style-name="Index_20_Link">6</text:a></text:p>
          <text:p text:style-name="P3"><text:a xlink:type="simple" xlink:href="#__RefHeading___Toc8573_3058386561" office:name="Word data structure" text:style-name="Index_20_Link" text:visited-style-name="Index_20_Link">Word data structure</text:a><text:tab/><text:a xlink:type="simple" xlink:href="#__RefHeading___Toc8573_3058386561" text:style-name="Index_20_Link" text:visited-style-name="Index_20_Link">6</text:a></text:p>
          <text:p text:style-name="P3"><text:a xlink:type="simple" xlink:href="#__RefHeading___Toc8575_3058386561" office:name="Plans" text:style-name="Index_20_Link" text:visited-style-name="Index_20_Link">Plans</text:a><text:tab/><text:a xlink:type="simple" xlink:href="#__RefHeading___Toc8575_3058386561" text:style-name="Index_20_Link" text:visited-style-name="Index_20_Link">6</text:a></text:p>
          <text:p text:style-name="P2"><text:a xlink:type="simple" xlink:href="#__RefHeading___Toc8577_3058386561" office:name="Parent Agent" text:style-name="Index_20_Link" text:visited-style-name="Index_20_Link">Parent Agent</text:a><text:tab/><text:a xlink:type="simple" xlink:href="#__RefHeading___Toc8577_3058386561" text:style-name="Index_20_Link" text:visited-style-name="Index_20_Link">7</text:a></text:p>
          <text:p text:style-name="P3"><text:a xlink:type="simple" xlink:href="#__RefHeading___Toc8579_3058386561" office:name="Plans" text:style-name="Index_20_Link" text:visited-style-name="Index_20_Link">Plans</text:a><text:tab/><text:a xlink:type="simple" xlink:href="#__RefHeading___Toc8579_3058386561" text:style-name="Index_20_Link" text:visited-style-name="Index_20_Link">7</text:a></text:p>
          <text:p text:style-name="P2"><text:a xlink:type="simple" xlink:href="#__RefHeading___Toc8581_3058386561" office:name="Teacher Agent" text:style-name="Index_20_Link" text:visited-style-name="Index_20_Link">Teacher Agent</text:a><text:tab/><text:a xlink:type="simple" xlink:href="#__RefHeading___Toc8581_3058386561" text:style-name="Index_20_Link" text:visited-style-name="Index_20_Link">7</text:a></text:p>
          <text:p text:style-name="P3"><text:a xlink:type="simple" xlink:href="#__RefHeading___Toc8583_3058386561" office:name="Initial belief" text:style-name="Index_20_Link" text:visited-style-name="Index_20_Link">Initial belief</text:a><text:tab/><text:a xlink:type="simple" xlink:href="#__RefHeading___Toc8583_3058386561" text:style-name="Index_20_Link" text:visited-style-name="Index_20_Link">7</text:a></text:p>
          <text:p text:style-name="P3"><text:a xlink:type="simple" xlink:href="#__RefHeading___Toc8585_3058386561" office:name="Plans" text:style-name="Index_20_Link" text:visited-style-name="Index_20_Link">Plans</text:a><text:tab/><text:a xlink:type="simple" xlink:href="#__RefHeading___Toc8585_3058386561" text:style-name="Index_20_Link" text:visited-style-name="Index_20_Link">7</text:a></text:p>
          <text:p text:style-name="P1"><text:a xlink:type="simple" xlink:href="#__RefHeading___Toc8587_3058386561" office:name="Environment Layer (CArtAgO Artefacts)" text:style-name="Index_20_Link" text:visited-style-name="Index_20_Link">Environment Layer (CArtAgO Artefacts)</text:a><text:tab/><text:a xlink:type="simple" xlink:href="#__RefHeading___Toc8587_3058386561" text:style-name="Index_20_Link" text:visited-style-name="Index_20_Link">8</text:a></text:p>
          <text:p text:style-name="P2"><text:a xlink:type="simple" xlink:href="#__RefHeading___Toc8589_3058386561" office:name="Library.java" text:style-name="Index_20_Link" text:visited-style-name="Index_20_Link">Library.java</text:a><text:tab/><text:a xlink:type="simple" xlink:href="#__RefHeading___Toc8589_3058386561" text:style-name="Index_20_Link" text:visited-style-name="Index_20_Link">8</text:a></text:p>
          <text:p text:style-name="P3"><text:a xlink:type="simple" xlink:href="#__RefHeading___Toc8591_3058386561" office:name="Data structures" text:style-name="Index_20_Link" text:visited-style-name="Index_20_Link">Data structures</text:a><text:tab/><text:a xlink:type="simple" xlink:href="#__RefHeading___Toc8591_3058386561" text:style-name="Index_20_Link" text:visited-style-name="Index_20_Link">8</text:a></text:p>
          <text:p text:style-name="P3"><text:a xlink:type="simple" xlink:href="#__RefHeading___Toc8593_3058386561" office:name="Static initialisation" text:style-name="Index_20_Link" text:visited-style-name="Index_20_Link">Static initialisation</text:a><text:tab/><text:a xlink:type="simple" xlink:href="#__RefHeading___Toc8593_3058386561" text:style-name="Index_20_Link" text:visited-style-name="Index_20_Link">8</text:a></text:p>
          <text:p text:style-name="P3"><text:a xlink:type="simple" xlink:href="#__RefHeading___Toc8595_3058386561" office:name="Observable properties" text:style-name="Index_20_Link" text:visited-style-name="Index_20_Link">Observable properties</text:a><text:tab/><text:a xlink:type="simple" xlink:href="#__RefHeading___Toc8595_3058386561" text:style-name="Index_20_Link" text:visited-style-name="Index_20_Link">8</text:a></text:p>
          <text:p text:style-name="P3"><text:a xlink:type="simple" xlink:href="#__RefHeading___Toc8597_3058386561" office:name="Operations" text:style-name="Index_20_Link" text:visited-style-name="Index_20_Link">Operations</text:a><text:tab/><text:a xlink:type="simple" xlink:href="#__RefHeading___Toc8597_3058386561" text:style-name="Index_20_Link" text:visited-style-name="Index_20_Link">8</text:a></text:p>
          <text:p text:style-name="P2"><text:a xlink:type="simple" xlink:href="#__RefHeading___Toc8599_3058386561" office:name="Utterances.java" text:style-name="Index_20_Link" text:visited-style-name="Index_20_Link">Utterances.java</text:a><text:tab/><text:a xlink:type="simple" xlink:href="#__RefHeading___Toc8599_3058386561" text:style-name="Index_20_Link" text:visited-style-name="Index_20_Link">9</text:a></text:p>
          <text:p text:style-name="P3"><text:a xlink:type="simple" xlink:href="#__RefHeading___Toc8601_3058386561" office:name="Data structures" text:style-name="Index_20_Link" text:visited-style-name="Index_20_Link">Data structures</text:a><text:tab/><text:a xlink:type="simple" xlink:href="#__RefHeading___Toc8601_3058386561" text:style-name="Index_20_Link" text:visited-style-name="Index_20_Link">9</text:a></text:p>
          <text:p text:style-name="P3"><text:a xlink:type="simple" xlink:href="#__RefHeading___Toc8603_3058386561" office:name="Static initialisation" text:style-name="Index_20_Link" text:visited-style-name="Index_20_Link">Static initialisation</text:a><text:tab/><text:a xlink:type="simple" xlink:href="#__RefHeading___Toc8603_3058386561" text:style-name="Index_20_Link" text:visited-style-name="Index_20_Link">9</text:a></text:p>
          <text:p text:style-name="P3"><text:a xlink:type="simple" xlink:href="#__RefHeading___Toc8605_3058386561" office:name="Observable properties" text:style-name="Index_20_Link" text:visited-style-name="Index_20_Link">Observable properties</text:a><text:tab/><text:a xlink:type="simple" xlink:href="#__RefHeading___Toc8605_3058386561" text:style-name="Index_20_Link" text:visited-style-name="Index_20_Link">9</text:a></text:p>
          <text:p text:style-name="P3"><text:a xlink:type="simple" xlink:href="#__RefHeading___Toc8607_3058386561" office:name="Operations" text:style-name="Index_20_Link" text:visited-style-name="Index_20_Link">Operations</text:a><text:tab/><text:a xlink:type="simple" xlink:href="#__RefHeading___Toc8607_3058386561" text:style-name="Index_20_Link" text:visited-style-name="Index_20_Link">9</text:a></text:p>
          <text:p text:style-name="P2"><text:a xlink:type="simple" xlink:href="#__RefHeading___Toc8609_3058386561" office:name="Synchroniser.java" text:style-name="Index_20_Link" text:visited-style-name="Index_20_Link">Synchroniser.java</text:a><text:tab/><text:a xlink:type="simple" xlink:href="#__RefHeading___Toc8609_3058386561" text:style-name="Index_20_Link" text:visited-style-name="Index_20_Link">9</text:a></text:p>
          <text:p text:style-name="P3"><text:a xlink:type="simple" xlink:href="#__RefHeading___Toc8611_3058386561" office:name="State machine" text:style-name="Index_20_Link" text:visited-style-name="Index_20_Link">State machine</text:a><text:tab/><text:a xlink:type="simple" xlink:href="#__RefHeading___Toc8611_3058386561" text:style-name="Index_20_Link" text:visited-style-name="Index_20_Link">10</text:a></text:p>
          <text:p text:style-name="P3"><text:a xlink:type="simple" xlink:href="#__RefHeading___Toc8613_3058386561" office:name="Static state" text:style-name="Index_20_Link" text:visited-style-name="Index_20_Link">Static state</text:a><text:tab/><text:a xlink:type="simple" xlink:href="#__RefHeading___Toc8613_3058386561" text:style-name="Index_20_Link" text:visited-style-name="Index_20_Link">10</text:a></text:p>
          <text:p text:style-name="P3"><text:a xlink:type="simple" xlink:href="#__RefHeading___Toc8615_3058386561" office:name="Observable properties" text:style-name="Index_20_Link" text:visited-style-name="Index_20_Link">Observable properties</text:a><text:tab/><text:a xlink:type="simple" xlink:href="#__RefHeading___Toc8615_3058386561" text:style-name="Index_20_Link" text:visited-style-name="Index_20_Link">10</text:a></text:p>
          <text:p text:style-name="P3"><text:a xlink:type="simple" xlink:href="#__RefHeading___Toc8617_3058386561" office:name="Operations" text:style-name="Index_20_Link" text:visited-style-name="Index_20_Link">Operations</text:a><text:tab/><text:a xlink:type="simple" xlink:href="#__RefHeading___Toc8617_3058386561" text:style-name="Index_20_Link" text:visited-style-name="Index_20_Link">10</text:a></text:p>
          <text:p text:style-name="P3"><text:a xlink:type="simple" xlink:href="#__RefHeading___Toc8619_3058386561" office:name="Private methods" text:style-name="Index_20_Link" text:visited-style-name="Index_20_Link">Private methods</text:a><text:tab/><text:a xlink:type="simple" xlink:href="#__RefHeading___Toc8619_3058386561" text:style-name="Index_20_Link" text:visited-style-name="Index_20_Link">11</text:a></text:p>
          <text:p text:style-name="P2"><text:a xlink:type="simple" xlink:href="#__RefHeading___Toc8621_3058386561" office:name="DataLogger.java" text:style-name="Index_20_Link" text:visited-style-name="Index_20_Link">DataLogger.java</text:a><text:tab/><text:a xlink:type="simple" xlink:href="#__RefHeading___Toc8621_3058386561" text:style-name="Index_20_Link" text:visited-style-name="Index_20_Link">11</text:a></text:p>
          <text:p text:style-name="P3"><text:a xlink:type="simple" xlink:href="#__RefHeading___Toc8623_3058386561" office:name="Static state" text:style-name="Index_20_Link" text:visited-style-name="Index_20_Link">Static state</text:a><text:tab/><text:a xlink:type="simple" xlink:href="#__RefHeading___Toc8623_3058386561" text:style-name="Index_20_Link" text:visited-style-name="Index_20_Link">11</text:a></text:p>
          <text:p text:style-name="P3"><text:a xlink:type="simple" xlink:href="#__RefHeading___Toc8625_3058386561" office:name="Operations" text:style-name="Index_20_Link" text:visited-style-name="Index_20_Link">Operations</text:a><text:tab/><text:a xlink:type="simple" xlink:href="#__RefHeading___Toc8625_3058386561" text:style-name="Index_20_Link" text:visited-style-name="Index_20_Link">11</text:a></text:p>
          <text:p text:style-name="P3"><text:a xlink:type="simple" xlink:href="#__RefHeading___Toc8627_3058386561" office:name="Static methods" text:style-name="Index_20_Link" text:visited-style-name="Index_20_Link">Static methods</text:a><text:tab/><text:a xlink:type="simple" xlink:href="#__RefHeading___Toc8627_3058386561" text:style-name="Index_20_Link" text:visited-style-name="Index_20_Link">11</text:a></text:p>
          <text:p text:style-name="P2"><text:a xlink:type="simple" xlink:href="#__RefHeading___Toc8629_3058386561" office:name="WordsLearnt.java" text:style-name="Index_20_Link" text:visited-style-name="Index_20_Link">WordsLearnt.java</text:a><text:tab/><text:a xlink:type="simple" xlink:href="#__RefHeading___Toc8629_3058386561" text:style-name="Index_20_Link" text:visited-style-name="Index_20_Link">11</text:a></text:p>
          <text:p text:style-name="P3"><text:a xlink:type="simple" xlink:href="#__RefHeading___Toc8631_3058386561" office:name="Data structure" text:style-name="Index_20_Link" text:visited-style-name="Index_20_Link">Data structure</text:a><text:tab/><text:a xlink:type="simple" xlink:href="#__RefHeading___Toc8631_3058386561" text:style-name="Index_20_Link" text:visited-style-name="Index_20_Link">11</text:a></text:p>
          <text:p text:style-name="P3"><text:a xlink:type="simple" xlink:href="#__RefHeading___Toc8633_3058386561" office:name="Operations" text:style-name="Index_20_Link" text:visited-style-name="Index_20_Link">Operations</text:a><text:tab/><text:a xlink:type="simple" xlink:href="#__RefHeading___Toc8633_3058386561" text:style-name="Index_20_Link" text:visited-style-name="Index_20_Link">11</text:a></text:p>
          <text:p text:style-name="P3"><text:a xlink:type="simple" xlink:href="#__RefHeading___Toc8635_3058386561" office:name="Static methods" text:style-name="Index_20_Link" text:visited-style-name="Index_20_Link">Static methods</text:a><text:tab/><text:a xlink:type="simple" xlink:href="#__RefHeading___Toc8635_3058386561" text:style-name="Index_20_Link" text:visited-style-name="Index_20_Link">11</text:a></text:p>
          <text:p text:style-name="P1"><text:a xlink:type="simple" xlink:href="#__RefHeading___Toc8637_3058386561" office:name="Organisational Layer (Moise)" text:style-name="Index_20_Link" text:visited-style-name="Index_20_Link">Organisational Layer (Moise)</text:a><text:tab/><text:a xlink:type="simple" xlink:href="#__RefHeading___Toc8637_3058386561" text:style-name="Index_20_Link" text:visited-style-name="Index_20_Link">12</text:a></text:p>
          <text:p text:style-name="P2"><text:a xlink:type="simple" xlink:href="#__RefHeading___Toc8639_3058386561" office:name="learning_environ.xml" text:style-name="Index_20_Link" text:visited-style-name="Index_20_Link">learning_environ.xml</text:a><text:tab/><text:a xlink:type="simple" xlink:href="#__RefHeading___Toc8639_3058386561" text:style-name="Index_20_Link" text:visited-style-name="Index_20_Link">12</text:a></text:p>
          <text:p text:style-name="P3"><text:a xlink:type="simple" xlink:href="#__RefHeading___Toc8641_3058386561" office:name="Structural specification" text:style-name="Index_20_Link" text:visited-style-name="Index_20_Link">Structural specification</text:a><text:tab/><text:a xlink:type="simple" xlink:href="#__RefHeading___Toc8641_3058386561" text:style-name="Index_20_Link" text:visited-style-name="Index_20_Link">12</text:a></text:p>
          <text:p text:style-name="P3"><text:a xlink:type="simple" xlink:href="#__RefHeading___Toc8643_3058386561" office:name="Functional specification" text:style-name="Index_20_Link" text:visited-style-name="Index_20_Link">Functional specification</text:a><text:tab/><text:a xlink:type="simple" xlink:href="#__RefHeading___Toc8643_3058386561" text:style-name="Index_20_Link" text:visited-style-name="Index_20_Link">12</text:a></text:p>
          <text:p text:style-name="P3"><text:a xlink:type="simple" xlink:href="#__RefHeading___Toc8645_3058386561" office:name="Normative specification" text:style-name="Index_20_Link" text:visited-style-name="Index_20_Link">Normative specification</text:a><text:tab/><text:a xlink:type="simple" xlink:href="#__RefHeading___Toc8645_3058386561" text:style-name="Index_20_Link" text:visited-style-name="Index_20_Link">12</text:a></text:p>
          <text:p text:style-name="P1"><text:a xlink:type="simple" xlink:href="#__RefHeading___Toc8647_3058386561" office:name="JaCaMo Project File" text:style-name="Index_20_Link" text:visited-style-name="Index_20_Link">JaCaMo Project File</text:a><text:tab/><text:a xlink:type="simple" xlink:href="#__RefHeading___Toc8647_3058386561" text:style-name="Index_20_Link" text:visited-style-name="Index_20_Link">12</text:a></text:p>
          <text:p text:style-name="P1"><text:a xlink:type="simple" xlink:href="#__RefHeading___Toc8649_3058386561" office:name="Simulation Lifecycle" text:style-name="Index_20_Link" text:visited-style-name="Index_20_Link">Simulation Lifecycle</text:a><text:tab/><text:a xlink:type="simple" xlink:href="#__RefHeading___Toc8649_3058386561" text:style-name="Index_20_Link" text:visited-style-name="Index_20_Link">13</text:a></text:p>
          <text:p text:style-name="P2"><text:a xlink:type="simple" xlink:href="#__RefHeading___Toc8651_3058386561" office:name="Startup Sequence" text:style-name="Index_20_Link" text:visited-style-name="Index_20_Link">Startup Sequence</text:a><text:tab/><text:a xlink:type="simple" xlink:href="#__RefHeading___Toc8651_3058386561" text:style-name="Index_20_Link" text:visited-style-name="Index_20_Link">13</text:a></text:p>
          <text:p text:style-name="P2"><text:a xlink:type="simple" xlink:href="#__RefHeading___Toc8653_3058386561" office:name="Daily Cycle" text:style-name="Index_20_Link" text:visited-style-name="Index_20_Link">Daily Cycle</text:a><text:tab/><text:a xlink:type="simple" xlink:href="#__RefHeading___Toc8653_3058386561" text:style-name="Index_20_Link" text:visited-style-name="Index_20_Link">13</text:a></text:p>
          <text:p text:style-name="P2"><text:a xlink:type="simple" xlink:href="#__RefHeading___Toc8655_3058386561" office:name="Yearly Progression" text:style-name="Index_20_Link" text:visited-style-name="Index_20_Link">Yearly Progression</text:a><text:tab/><text:a xlink:type="simple" xlink:href="#__RefHeading___Toc8655_3058386561" text:style-name="Index_20_Link" text:visited-style-name="Index_20_Link">13</text:a></text:p>
          <text:p text:style-name="P2"><text:a xlink:type="simple" xlink:href="#__RefHeading___Toc8657_3058386561" office:name="Shutdown Sequence" text:style-name="Index_20_Link" text:visited-style-name="Index_20_Link">Shutdown Sequence</text:a><text:tab/><text:a xlink:type="simple" xlink:href="#__RefHeading___Toc8657_3058386561" text:style-name="Index_20_Link" text:visited-style-name="Index_20_Link">14</text:a></text:p>
          <text:p text:style-name="P1"><text:a xlink:type="simple" xlink:href="#__RefHeading___Toc8659_3058386561" office:name="Word Learning Algorithm" text:style-name="Index_20_Link" text:visited-style-name="Index_20_Link">Word Learning Algorithm</text:a><text:tab/><text:a xlink:type="simple" xlink:href="#__RefHeading___Toc8659_3058386561" text:style-name="Index_20_Link" text:visited-style-name="Index_20_Link">14</text:a></text:p>
          <text:p text:style-name="P1"><text:a xlink:type="simple" xlink:href="#__RefHeading___Toc8661_3058386561" office:name="Concurrency and Synchronisation" text:style-name="Index_20_Link" text:visited-style-name="Index_20_Link">Concurrency and Synchronisation</text:a><text:tab/><text:a xlink:type="simple" xlink:href="#__RefHeading___Toc8661_3058386561" text:style-name="Index_20_Link" text:visited-style-name="Index_20_Link">14</text:a></text:p>
          <text:p text:style-name="P1"><text:a xlink:type="simple" xlink:href="#__RefHeading___Toc8663_3058386561" office:name="Data Flow" text:style-name="Index_20_Link" text:visited-style-name="Index_20_Link">Data Flow</text:a><text:tab/><text:a xlink:type="simple" xlink:href="#__RefHeading___Toc8663_3058386561" text:style-name="Index_20_Link" text:visited-style-name="Index_20_Link">15</text:a></text:p>
          <text:p text:style-name="P1"><text:a xlink:type="simple" xlink:href="#__RefHeading___Toc8665_3058386561" office:name="Logging Configuration" text:style-name="Index_20_Link" text:visited-style-name="Index_20_Link">Logging Configuration</text:a><text:tab/><text:a xlink:type="simple" xlink:href="#__RefHeading___Toc8665_3058386561" text:style-name="Index_20_Link" text:visited-style-name="Index_20_Link">16</text:a></text:p>
          <text:p text:style-name="P1"><text:a xlink:type="simple" xlink:href="#__RefHeading___Toc8669_3058386561" office:name="Known Limitations and Unimplemented Features" text:style-name="Index_20_Link" text:visited-style-name="Index_20_Link">Known Limitations and Unimplemented Features</text:a><text:tab/><text:a xlink:type="simple" xlink:href="#__RefHeading___Toc8669_3058386561" text:style-name="Index_20_Link" text:visited-style-name="Index_20_Link">16</text:a></text:p>
        </text:index-body>
      </text:table-of-content>
      <text:h text:style-name="P4" text:outline-level="1"><text:bookmark text:name="_mcp_9819be9e"/><text:bookmark-start text:name="introduction"/><text:bookmark-start text:name="__RefHeading___Toc8527_3058386561"/>Introduction<text:bookmark-end text:name="introduction"/><text:bookmark-end text:name="__RefHeading___Toc8527_3058386561"/></text:h>
      <text:p text:style-name="Text_20_body">This document provides a detailed, developer-focused description of the Child Vocabulary Acquisition (CVA) simulation codebase. It is intended for developers who wish to understand, maintain, or extend the system.</text:p>
      <text:p text:style-name="P5">The CVA simulation models how children acquire vocabulary through exposure to spoken language (at home) and written text (at school), with exposure volumes determined by socio-economic status (SES). It is built on the JaCaMo multi-agent platform, version 1.3.0.</text:p>
      <text:h text:style-name="P6" text:outline-level="1"><text:bookmark text:name="_mcp_6256ca6e"/><text:bookmark-start text:name="__RefHeading___Toc8529_3058386561"/><text:bookmark-start text:name="project-structure"/>Project Structure<text:bookmark-end text:name="__RefHeading___Toc8529_3058386561"/><text:bookmark-end text:name="project-structure"/></text:h>
      <text:p text:style-name="P7">child_vocabulary_acquisition/</text:p>
      <text:p text:style-name="P8">+-- build.gradle<text:tab/><text:tab/><text:tab/><text:tab/><text:tab/><text:tab/># Gradle build configuration</text:p>
      <text:p text:style-name="P8">+-- settings.gradle<text:tab/><text:tab/><text:tab/><text:tab/><text:tab/># Gradle settings</text:p>
      <text:p text:style-name="P8">+-- child_vocabulary_acquisition.jcm<text:tab/><text:tab/># JaCaMo project definition</text:p>
      <text:p text:style-name="P8">+-- simulation.conf<text:tab/><text:tab/><text:tab/><text:tab/><text:tab/># Runtime configuration (TOML)</text:p>
      <text:p text:style-name="P8">+-- logging.properties<text:tab/><text:tab/><text:tab/><text:tab/><text:tab/># Java logging configuration</text:p>
      <text:p text:style-name="P8">+-- README.md<text:tab/><text:tab/><text:tab/><text:tab/><text:tab/><text:tab/># Project readme</text:p>
      <text:p text:style-name="P8">+-- gradlew / gradlew.bat<text:tab/><text:tab/><text:tab/><text:tab/># Gradle wrapper scripts</text:p>
      <text:p text:style-name="P8">+-- src/</text:p>
      <text:p text:style-name="P8">| <text:s text:c="2"/>+-- agt/<text:tab/><text:tab/><text:tab/><text:tab/><text:tab/><text:tab/># Agent source files (AgentSpeak)</text:p>
      <text:p text:style-name="P8">| <text:s text:c="2"/>| <text:s text:c="2"/>+-- child.asl<text:tab/><text:tab/><text:tab/><text:tab/><text:tab/># Child agent plans</text:p>
      <text:p text:style-name="P8">| <text:s text:c="2"/>| <text:s text:c="2"/>+-- parent.asl<text:tab/><text:tab/><text:tab/><text:tab/><text:tab/># Parent agent plans</text:p>
      <text:p text:style-name="P8">| <text:s text:c="2"/>| <text:s text:c="2"/>+-- teacher.asl<text:tab/><text:tab/><text:tab/><text:tab/><text:tab/># Teacher agent plans</text:p>
      <text:p text:style-name="P8">| <text:s text:c="2"/>| <text:s text:c="2"/>+-- inc/<text:tab/><text:tab/><text:tab/><text:tab/><text:tab/><text:tab/># Shared agent includes</text:p>
      <text:p text:style-name="P8">| <text:s text:c="2"/>| <text:s text:c="2"/>| <text:s text:c="2"/>+-- common.asl<text:tab/><text:tab/><text:tab/><text:tab/># Plans common to all agents</text:p>
      <text:p text:style-name="P8">| <text:s text:c="2"/>| <text:s text:c="2"/>| <text:s text:c="2"/>+-- child_common.asl<text:tab/><text:tab/><text:tab/># Plans common to child agents</text:p>
      <text:p text:style-name="P8">| <text:s text:c="2"/>| <text:s text:c="2"/>| <text:s text:c="2"/>+-- adult_common.asl<text:tab/><text:tab/><text:tab/># Plans common to adult agents</text:p>
      <text:p text:style-name="P8">| <text:s text:c="2"/>+-- env/<text:tab/><text:tab/><text:tab/><text:tab/><text:tab/><text:tab/># Java environment classes</text:p>
      <text:p text:style-name="P8">| <text:s text:c="2"/>| <text:s text:c="2"/>+-- VocabLauncher.java<text:tab/><text:tab/><text:tab/># Custom JaCaMo launcher</text:p>
      <text:p text:style-name="P8">| <text:s text:c="2"/>| <text:s text:c="2"/>+-- Synchroniser.java<text:tab/><text:tab/><text:tab/><text:tab/># Simulation coordination artefact</text:p>
      <text:p text:style-name="P8">| <text:s text:c="2"/>| <text:s text:c="2"/>+-- Library.java<text:tab/><text:tab/><text:tab/><text:tab/># Book corpus artefact</text:p>
      <text:p text:style-name="P8">| <text:s text:c="2"/>| <text:s text:c="2"/>+-- Utterances.java<text:tab/><text:tab/><text:tab/><text:tab/># Speech corpus artefact</text:p>
      <text:p text:style-name="P8">| <text:s text:c="2"/>| <text:s text:c="2"/>+-- DataLogger.java<text:tab/><text:tab/><text:tab/><text:tab/># Statistics recording artefact</text:p>
      <text:p text:style-name="P8">| <text:s text:c="2"/>| <text:s text:c="2"/>+-- WordsLearnt.java<text:tab/><text:tab/><text:tab/><text:tab/># Word-level tracking artefact</text:p>
      <text:p text:style-name="P8">| <text:s text:c="2"/>| <text:s text:c="2"/>+-- ConfigFile.java<text:tab/><text:tab/><text:tab/><text:tab/># TOML configuration parser</text:p>
      <text:p text:style-name="P8">| <text:s text:c="2"/>| <text:s text:c="2"/>+-- Agents.java<text:tab/><text:tab/><text:tab/><text:tab/><text:tab/># Agent configuration data holder</text:p>
      <text:p text:style-name="P8">| <text:s text:c="2"/>| <text:s text:c="2"/>+-- Environment.java<text:tab/><text:tab/><text:tab/><text:tab/># Environment path configuration</text:p>
      <text:p text:style-name="P8">| <text:s text:c="2"/>| <text:s text:c="2"/>+-- SES.java<text:tab/><text:tab/><text:tab/><text:tab/><text:tab/># Socio-economic status model</text:p>
      <text:p text:style-name="P8">| <text:s text:c="2"/>| <text:s text:c="2"/>+-- CircularQueue.java<text:tab/><text:tab/><text:tab/># Generic circular queue utility</text:p>
      <text:p text:style-name="P9">| <text:s text:c="2"/>| <text:s text:c="2"/>+-- WordCountRow.java<text:tab/><text:tab/><text:tab/><text:tab/># Annual statistics record</text:p>
      <text:p text:style-name="P9">| <text:s text:c="2"/>| <text:s text:c="2"/>+-- WordLearntRow.java<text:tab/><text:tab/><text:tab/># Learned word record</text:p>
      <text:p text:style-name="P9"><text:bookmark text:name="_mcp_a64a8f5f"/>| <text:s text:c="2"/>| <text:s text:c="2"/>+-- HashMapBB.java<text:tab/><text:tab/><text:tab/><text:tab/># Custom indexed belief base</text:p>
      <text:p text:style-name="P8">| <text:s text:c="2"/>+-- int/<text:tab/><text:tab/><text:tab/><text:tab/><text:tab/><text:tab/># Interaction definitions (empty)</text:p>
      <text:p text:style-name="P8">| <text:s text:c="2"/>+-- org/<text:tab/><text:tab/><text:tab/><text:tab/><text:tab/><text:tab/># Moise organisation definitions</text:p>
      <text:p text:style-name="P10">| <text:s text:c="6"/>+-- learning_environ.xml<text:tab/><text:tab/><text:tab/># Organisational specification</text:p>
      <text:h text:style-name="Heading_20_1" text:outline-level="1" text:is-list-header="true"><text:bookmark text:name="_mcp_2dac11fa"/><text:bookmark-start text:name="architecture-overview"/><text:bookmark-start text:name="__RefHeading___Toc8531_3058386561"/>Architecture Overview<text:bookmark-end text:name="architecture-overview"/><text:bookmark-end text:name="__RefHeading___Toc8531_3058386561"/></text:h>
      <text:h text:style-name="Heading_20_2" text:outline-level="2"><text:bookmark text:name="_mcp_77034616"/><text:bookmark-start text:name="jacamo-framework"/><text:bookmark-start text:name="__RefHeading___Toc8533_3058386561"/>JaCaMo Framework<text:bookmark-end text:name="jacamo-framework"/><text:bookmark-end text:name="__RefHeading___Toc8533_3058386561"/></text:h>
      <text:p text:style-name="Text_20_body">JaCaMo integrates three technologies:</text:p>
      <text:list text:style-name="L1">
        <text:list-item>
          <text:p text:style-name="P11"><text:span text:style-name="T1">Jason</text:span> – A BDI (Belief-Desire-Intention) agent programming language based on AgentSpeak(L). Agents are defined in <text:span text:style-name="Source_5f_Text"><text:span text:style-name="T2">.asl</text:span></text:span> files containing beliefs, goals, and plans.</text:p>
        </text:list-item>
        <text:list-item>
          <text:p text:style-name="P11"><text:span text:style-name="T1">CArtAgO</text:span> – Common ARTifact infrastructure for AGents in Open environments. Provides the artefact abstraction for environment entities that agents interact with via operations and observable properties.</text:p>
        </text:list-item>
        <text:list-item>
          <text:p text:style-name="P12"><text:span text:style-name="T1">Moise</text:span> – A model for organisational structures. Defines roles, groups, schemes, and norms that constrain agent behaviour.</text:p>
        </text:list-item>
      </text:list>
      <text:h text:style-name="P13" text:outline-level="2"><text:bookmark text:name="_mcp_8ee59c4e"/><text:bookmark-start text:name="system-architecture-diagram"/><text:bookmark-start text:name="__RefHeading___Toc8535_3058386561"/><text:soft-page-break/>System Architecture Diagram<text:bookmark-end text:name="system-architecture-diagram"/><text:bookmark-end text:name="__RefHeading___Toc8535_3058386561"/></text:h>
      <text:p text:style-name="Text_20_body">The system comprises four workspace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Workspace</text:p>
            </table:table-cell>
            <table:table-cell table:style-name="Table1.A1" office:value-type="string">
              <text:p text:style-name="Table_20_Heading">Artefacts</text:p>
            </table:table-cell>
            <table:table-cell table:style-name="Table1.C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ource_20_Text">classroom</text:span></text:p>
          </table:table-cell>
          <table:table-cell table:style-name="Table1.A2" office:value-type="string">
            <text:p text:style-name="Table_20_Contents"><text:span text:style-name="Source_20_Text">Library</text:span></text:p>
          </table:table-cell>
          <table:table-cell table:style-name="Table1.C2" office:value-type="string">
            <text:p text:style-name="Table_20_Contents">School environment – book reading</text:p>
          </table:table-cell>
        </table:table-row>
        <table:table-row>
          <table:table-cell table:style-name="Table1.A2" office:value-type="string">
            <text:p text:style-name="Table_20_Contents"><text:span text:style-name="Source_20_Text">home_environ</text:span></text:p>
          </table:table-cell>
          <table:table-cell table:style-name="Table1.A2" office:value-type="string">
            <text:p text:style-name="Table_20_Contents"><text:span text:style-name="Source_20_Text">Utterances</text:span></text:p>
          </table:table-cell>
          <table:table-cell table:style-name="Table1.C2" office:value-type="string">
            <text:p text:style-name="Table_20_Contents">Home environment – speech exposure</text:p>
          </table:table-cell>
        </table:table-row>
        <table:table-row>
          <table:table-cell table:style-name="Table1.A2" office:value-type="string">
            <text:p text:style-name="Table_20_Contents"><text:span text:style-name="Source_20_Text">sync</text:span></text:p>
          </table:table-cell>
          <table:table-cell table:style-name="Table1.A2" office:value-type="string">
            <text:p text:style-name="Table_20_Contents"><text:span text:style-name="Source_20_Text">Synchroniser</text:span>, <text:span text:style-name="Source_20_Text">DataLogger</text:span>, <text:span text:style-name="Source_20_Text">WordsLearnt</text:span></text:p>
          </table:table-cell>
          <table:table-cell table:style-name="Table1.C2" office:value-type="string">
            <text:p text:style-name="Table_20_Contents">Coordination and data recording</text:p>
          </table:table-cell>
        </table:table-row>
        <table:table-row>
          <table:table-cell table:style-name="Table1.A2" office:value-type="string">
            <text:p text:style-name="Table_20_Contents"><text:span text:style-name="Source_20_Text">learning_environ</text:span></text:p>
          </table:table-cell>
          <table:table-cell table:style-name="Table1.A2" office:value-type="string">
            <text:p text:style-name="Table_20_Contents">(Moise groups and schemes)</text:p>
          </table:table-cell>
          <table:table-cell table:style-name="Table1.C2" office:value-type="string">
            <text:p text:style-name="Table_20_Contents">Organisational structure</text:p>
          </table:table-cell>
        </table:table-row>
      </table:table>
      <text:p text:style-name="Text_20_body">Agent-artefact interactions:</text:p>
      <text:list text:style-name="L2">
        <text:list-item>
          <text:p text:style-name="P14"><text:span text:style-name="T1">Child agents</text:span> focus on: <text:span text:style-name="Source_20_Text">Library</text:span>, <text:span text:style-name="Source_20_Text">Synchroniser</text:span>, <text:span text:style-name="Source_20_Text">DataLogger</text:span>, <text:span text:style-name="Source_20_Text">WordsLearnt</text:span>, plus Moise group artefacts.</text:p>
        </text:list-item>
        <text:list-item>
          <text:p text:style-name="P14"><text:span text:style-name="T1">Parent agents</text:span> focus on: <text:span text:style-name="Source_20_Text">Utterances</text:span>, <text:span text:style-name="Source_20_Text">Synchroniser</text:span>, plus Moise group artefacts.</text:p>
        </text:list-item>
        <text:list-item>
          <text:p text:style-name="P14"><text:span text:style-name="T1">Teacher agent</text:span> focuses on: <text:span text:style-name="Source_20_Text">Library</text:span>, <text:span text:style-name="Source_20_Text">Synchroniser</text:span>, plus Moise group artefacts.</text:p>
        </text:list-item>
      </text:list>
      <text:h text:style-name="Heading_20_1" text:outline-level="1"><text:bookmark text:name="_mcp_8c00d3fe"/><text:bookmark-start text:name="build-system-and-dependencies"/><text:bookmark-start text:name="__RefHeading___Toc8537_3058386561"/>Build System and Dependencies<text:bookmark-end text:name="build-system-and-dependencies"/><text:bookmark-end text:name="__RefHeading___Toc8537_3058386561"/></text:h>
      <text:h text:style-name="Heading_20_2" text:outline-level="2"><text:bookmark text:name="_mcp_8b53bf01"/><text:bookmark-start text:name="gradle-configuration"/><text:bookmark-start text:name="__RefHeading___Toc8539_3058386561"/>Gradle Configuration<text:bookmark-end text:name="gradle-configuration"/><text:bookmark-end text:name="__RefHeading___Toc8539_3058386561"/></text:h>
      <text:p text:style-name="Text_20_body">The project uses Gradle with the Shadow plugin for fat JAR creation. Key configuration in <text:span text:style-name="Source_20_Text">build.gradle</text:span>:</text:p>
      <text:list text:style-name="L3">
        <text:list-item>
          <text:p text:style-name="P15"><text:span text:style-name="T1">Entry point:</text:span> <text:span text:style-name="Source_20_Text">vocab.VocabLauncher</text:span> (overrides the default <text:span text:style-name="Source_20_Text">jacamo.infra.JaCaMoLauncher</text:span>)</text:p>
        </text:list-item>
        <text:list-item>
          <text:p text:style-name="P15"><text:span text:style-name="T1">Source sets:</text:span> <text:span text:style-name="Source_20_Text">src/env</text:span>, <text:span text:style-name="Source_20_Text">src/agt</text:span>, <text:span text:style-name="Source_20_Text">src/org</text:span>, <text:span text:style-name="Source_20_Text">src/int</text:span>, <text:span text:style-name="Source_20_Text">src/java</text:span></text:p>
        </text:list-item>
        <text:list-item>
          <text:p text:style-name="P15"><text:span text:style-name="T1">Default task:</text:span> <text:span text:style-name="Source_20_Text">run</text:span></text:p>
        </text:list-item>
      </text:list>
      <text:h text:style-name="Heading_20_2" text:outline-level="2"><text:bookmark text:name="_mcp_36fae860"/><text:bookmark-start text:name="dependencies"/><text:bookmark-start text:name="__RefHeading___Toc8541_3058386561"/>Dependencies<text:bookmark-end text:name="dependencies"/><text:bookmark-end text:name="__RefHeading___Toc8541_3058386561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Dependency</text:p>
            </table:table-cell>
            <table:table-cell table:style-name="Table2.A1" office:value-type="string">
              <text:p text:style-name="Table_20_Heading">Version</text:p>
            </table:table-cell>
            <table:table-cell table:style-name="Table2.C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2" office:value-type="string">
            <text:p text:style-name="Table_20_Contents"><text:span text:style-name="Source_20_Text">org.jacamo:jacamo</text:span></text:p>
          </table:table-cell>
          <table:table-cell table:style-name="Table2.A2" office:value-type="string">
            <text:p text:style-name="Table_20_Contents">1.3.0</text:p>
          </table:table-cell>
          <table:table-cell table:style-name="Table2.C2" office:value-type="string">
            <text:p text:style-name="Table_20_Contents">Multi-agent platform</text:p>
          </table:table-cell>
        </table:table-row>
        <table:table-row>
          <table:table-cell table:style-name="Table2.A2" office:value-type="string">
            <text:p text:style-name="Table_20_Contents"><text:span text:style-name="Source_20_Text">com.opencsv:opencsv</text:span></text:p>
          </table:table-cell>
          <table:table-cell table:style-name="Table2.A2" office:value-type="string">
            <text:p text:style-name="Table_20_Contents">5.12.0</text:p>
          </table:table-cell>
          <table:table-cell table:style-name="Table2.C2" office:value-type="string">
            <text:p text:style-name="Table_20_Contents">CSV file parsing and writing</text:p>
          </table:table-cell>
        </table:table-row>
        <table:table-row>
          <table:table-cell table:style-name="Table2.A2" office:value-type="string">
            <text:p text:style-name="Table_20_Contents"><text:span text:style-name="Source_20_Text">com.electronwill.night-config:toml</text:span></text:p>
          </table:table-cell>
          <table:table-cell table:style-name="Table2.A2" office:value-type="string">
            <text:p text:style-name="Table_20_Contents">3.8.3</text:p>
          </table:table-cell>
          <table:table-cell table:style-name="Table2.C2" office:value-type="string">
            <text:p text:style-name="Table_20_Contents">TOML configuration file parsing</text:p>
          </table:table-cell>
        </table:table-row>
        <table:table-row>
          <table:table-cell table:style-name="Table2.A2" office:value-type="string">
            <text:p text:style-name="Table_20_Contents"><text:span text:style-name="Source_20_Text">com.gradleup.shadow</text:span></text:p>
          </table:table-cell>
          <table:table-cell table:style-name="Table2.A2" office:value-type="string">
            <text:p text:style-name="Table_20_Contents">8.3.3</text:p>
          </table:table-cell>
          <table:table-cell table:style-name="Table2.C2" office:value-type="string">
            <text:p text:style-name="Table_20_Contents">Fat JAR packaging (Gradle plugin)</text:p>
          </table:table-cell>
        </table:table-row>
      </table:table>
      <text:h text:style-name="Heading_20_2" text:outline-level="2"><text:bookmark text:name="_mcp_bf28e248"/><text:bookmark-start text:name="build-tasks"/><text:bookmark-start text:name="__RefHeading___Toc8543_3058386561"/>Build Tasks<text:bookmark-end text:name="build-tasks"/><text:bookmark-end text:name="__RefHeading___Toc8543_3058386561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Task</text:p>
            </table:table-cell>
            <table:table-cell table:style-name="Table3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radle / gradle run</text:span></text:p>
          </table:table-cell>
          <table:table-cell table:style-name="Table3.B2" office:value-type="string">
            <text:p text:style-name="Table_20_Contents">Compile and run the simulation</text:p>
          </table:table-cell>
        </table:table-row>
        <table:table-row>
          <table:table-cell table:style-name="Table3.A2" office:value-type="string">
            <text:p text:style-name="Table_20_Contents"><text:span text:style-name="Source_20_Text">gradle shadowJar</text:span></text:p>
          </table:table-cell>
          <table:table-cell table:style-name="Table3.B2" office:value-type="string">
            <text:p text:style-name="Table_20_Contents">Create a self-contained executable JAR</text:p>
          </table:table-cell>
        </table:table-row>
        <table:table-row>
          <table:table-cell table:style-name="Table3.A2" office:value-type="string">
            <text:p text:style-name="Table_20_Contents"><text:span text:style-name="Source_20_Text">gradle clean</text:span></text:p>
          </table:table-cell>
          <table:table-cell table:style-name="Table3.B2" office:value-type="string">
            <text:p text:style-name="Table_20_Contents">Remove <text:span text:style-name="Source_20_Text">bin/</text:span>, <text:span text:style-name="Source_20_Text">build/</text:span>, and <text:span text:style-name="Source_20_Text">log/</text:span> directories</text:p>
          </table:table-cell>
        </table:table-row>
      </table:table>
      <text:h text:style-name="P16" text:outline-level="1"><text:bookmark text:name="_mcp_80992bb7"/><text:bookmark-start text:name="configuration-system"/><text:bookmark-start text:name="__RefHeading___Toc8545_3058386561"/>Configuration System<text:bookmark-end text:name="configuration-system"/><text:bookmark-end text:name="__RefHeading___Toc8545_3058386561"/></text:h>
      <text:h text:style-name="Heading_20_2" text:outline-level="2"><text:bookmark text:name="_mcp_af501d0c"/><text:bookmark-start text:name="simulationconf"/><text:bookmark-start text:name="__RefHeading___Toc8547_3058386561"/>simulation.conf<text:bookmark-end text:name="simulationconf"/><text:bookmark-end text:name="__RefHeading___Toc8547_3058386561"/></text:h>
      <text:p text:style-name="Text_20_body">The runtime configuration file uses TOML syntax and contains three sections:</text:p>
      <text:p text:style-name="Text_20_body"><text:span text:style-name="Source_20_Text">[agents]</text:span> – Controls agent population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Key</text:p>
            </table:table-cell>
            <table:table-cell table:style-name="Table4.A1" office:value-type="string">
              <text:p text:style-name="Table_20_Heading">Type</text:p>
            </table:table-cell>
            <table:table-cell table:style-name="Table4.A1" office:value-type="string">
              <text:p text:style-name="Table_20_Heading">Default</text:p>
            </table:table-cell>
            <table:table-cell table:style-name="Table4.A1" office:value-type="string">
              <text:p text:style-name="Table_20_Heading">Range</text:p>
            </table:table-cell>
            <table:table-cell table:style-name="Table4.E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2" office:value-type="string">
            <text:p text:style-name="Table_20_Contents"><text:span text:style-name="Source_20_Text">child</text:span></text:p>
          </table:table-cell>
          <table:table-cell table:style-name="Table4.A2" office:value-type="string">
            <text:p text:style-name="Table_20_Contents"><text:span text:style-name="Source_20_Text">int</text:span></text:p>
          </table:table-cell>
          <table:table-cell table:style-name="Table4.A2" office:value-type="string">
            <text:p text:style-name="Table_20_Contents"><text:span text:style-name="Source_20_Text">10</text:span></text:p>
          </table:table-cell>
          <table:table-cell table:style-name="Table4.A2" office:value-type="string">
            <text:p text:style-name="Table_20_Contents">User discretion</text:p>
          </table:table-cell>
          <table:table-cell table:style-name="Table4.E2" office:value-type="string">
            <text:p text:style-name="Table_20_Contents">Number of child agents</text:p>
          </table:table-cell>
        </table:table-row>
        <table:table-row>
          <table:table-cell table:style-name="Table4.A2" office:value-type="string">
            <text:p text:style-name="Table_20_Contents"><text:span text:style-name="Source_20_Text">max_siblings</text:span></text:p>
          </table:table-cell>
          <table:table-cell table:style-name="Table4.A2" office:value-type="string">
            <text:p text:style-name="Table_20_Contents"><text:span text:style-name="Source_20_Text">int</text:span></text:p>
          </table:table-cell>
          <table:table-cell table:style-name="Table4.A2" office:value-type="string">
            <text:p text:style-name="Table_20_Contents"><text:span text:style-name="Source_20_Text">0</text:span></text:p>
          </table:table-cell>
          <table:table-cell table:style-name="Table4.A2" office:value-type="string">
            <text:p text:style-name="Table_20_Contents"><text:span text:style-name="Source_20_Text">0–2</text:span></text:p>
          </table:table-cell>
          <table:table-cell table:style-name="Table4.E2" office:value-type="string">
            <text:p text:style-name="Table_20_Contents">Siblings per child (not implemented)</text:p>
          </table:table-cell>
        </table:table-row>
        <table:table-row>
          <table:table-cell table:style-name="Table4.A2" office:value-type="string">
            <text:p text:style-name="Table_20_Contents"><text:span text:style-name="Source_20_Text">percent_single_parents</text:span></text:p>
          </table:table-cell>
          <table:table-cell table:style-name="Table4.A2" office:value-type="string">
            <text:p text:style-name="Table_20_Contents"><text:span text:style-name="Source_20_Text">float</text:span></text:p>
          </table:table-cell>
          <table:table-cell table:style-name="Table4.A2" office:value-type="string">
            <text:p text:style-name="Table_20_Contents"><text:span text:style-name="Source_20_Text">100.0</text:span></text:p>
          </table:table-cell>
          <table:table-cell table:style-name="Table4.A2" office:value-type="string">
            <text:p text:style-name="Table_20_Contents"><text:span text:style-name="Source_20_Text">0.0–100.0</text:span></text:p>
          </table:table-cell>
          <table:table-cell table:style-name="Table4.E2" office:value-type="string">
            <text:p text:style-name="Table_20_Contents">Percentage of single-parent households</text:p>
          </table:table-cell>
        </table:table-row>
        <table:table-row>
          <table:table-cell table:style-name="Table4.A2" office:value-type="string">
            <text:p text:style-name="Table_20_Contents"><text:span text:style-name="Source_20_Text">age_start</text:span></text:p>
          </table:table-cell>
          <table:table-cell table:style-name="Table4.A2" office:value-type="string">
            <text:p text:style-name="Table_20_Contents"><text:span text:style-name="Source_20_Text">int</text:span></text:p>
          </table:table-cell>
          <table:table-cell table:style-name="Table4.A2" office:value-type="string">
            <text:p text:style-name="Table_20_Contents"><text:span text:style-name="Source_20_Text">3</text:span></text:p>
          </table:table-cell>
          <table:table-cell table:style-name="Table4.A2" office:value-type="string">
            <text:p text:style-name="Table_20_Contents"><text:span text:style-name="Source_20_Text">0–5</text:span></text:p>
          </table:table-cell>
          <table:table-cell table:style-name="Table4.E2" office:value-type="string">
            <text:p text:style-name="Table_20_Contents">Starting age of children</text:p>
          </table:table-cell>
        </table:table-row>
        <text:soft-page-break/>
        <table:table-row>
          <table:table-cell table:style-name="Table4.A2" office:value-type="string">
            <text:p text:style-name="Table_20_Contents"><text:span text:style-name="Source_20_Text">age_finish</text:span></text:p>
          </table:table-cell>
          <table:table-cell table:style-name="Table4.A2" office:value-type="string">
            <text:p text:style-name="Table_20_Contents"><text:span text:style-name="Source_20_Text">int</text:span></text:p>
          </table:table-cell>
          <table:table-cell table:style-name="Table4.A2" office:value-type="string">
            <text:p text:style-name="Table_20_Contents"><text:span text:style-name="Source_20_Text">8</text:span></text:p>
          </table:table-cell>
          <table:table-cell table:style-name="Table4.A2" office:value-type="string">
            <text:p text:style-name="Table_20_Contents"><text:span text:style-name="Source_20_Text">5–10</text:span></text:p>
          </table:table-cell>
          <table:table-cell table:style-name="Table4.E2" office:value-type="string">
            <text:p text:style-name="Table_20_Contents">Finishing age of children</text:p>
          </table:table-cell>
        </table:table-row>
      </table:table>
      <text:p text:style-name="Text_20_body"><text:span text:style-name="Source_20_Text">[[ses]]</text:span> – SES categories (array of tables). Each entry requires <text:span text:style-name="Source_20_Text">name</text:span> (string) and <text:span text:style-name="Source_20_Text">qty</text:span> (int) keys. Defaults: Welfare (8,767), Working (17,514), Professional (30,142).</text:p>
      <text:p text:style-name="Text_20_body"><text:span text:style-name="Source_20_Text">[environment.locations]</text:span> – Paths to data directories: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7">Key</text:p>
            </table:table-cell>
            <table:table-cell table:style-name="Table5.A1" office:value-type="string">
              <text:p text:style-name="P17">Default</text:p>
            </table:table-cell>
            <table:table-cell table:style-name="Table5.C1" office:value-type="string">
              <text:p text:style-name="P17">Description</text:p>
            </table:table-cell>
          </table:table-row>
        </table:table-header-rows>
        <table:table-row>
          <table:table-cell table:style-name="Table5.A2" office:value-type="string">
            <text:p text:style-name="Preformatted_20_Text"><text:span text:style-name="Source_20_Text">utterances</text:span></text:p>
          </table:table-cell>
          <table:table-cell table:style-name="Table5.A2" office:value-type="string">
            <text:p text:style-name="Preformatted_20_Text"><text:span text:style-name="Source_20_Text">./resources/utterances</text:span></text:p>
          </table:table-cell>
          <table:table-cell table:style-name="Table5.C2" office:value-type="string">
            <text:p text:style-name="P18">Directory containing utterance CSV files</text:p>
          </table:table-cell>
        </table:table-row>
        <table:table-row>
          <table:table-cell table:style-name="Table5.A2" office:value-type="string">
            <text:p text:style-name="Preformatted_20_Text"><text:span text:style-name="Source_20_Text">books</text:span></text:p>
          </table:table-cell>
          <table:table-cell table:style-name="Table5.A2" office:value-type="string">
            <text:p text:style-name="Preformatted_20_Text"><text:span text:style-name="Source_20_Text">./resources/books</text:span></text:p>
          </table:table-cell>
          <table:table-cell table:style-name="Table5.C2" office:value-type="string">
            <text:p text:style-name="P19">Directory containing book text files</text:p>
          </table:table-cell>
        </table:table-row>
      </table:table>
      <text:h text:style-name="Heading_20_2" text:outline-level="2"><text:bookmark text:name="_mcp_826a31b9"/><text:bookmark-start text:name="configfilejava"/><text:bookmark-start text:name="__RefHeading___Toc8549_3058386561"/>ConfigFile.java<text:bookmark-end text:name="configfilejava"/><text:bookmark-end text:name="__RefHeading___Toc8549_3058386561"/></text:h>
      <text:p text:style-name="P20"><text:span text:style-name="T1">Package:</text:span> <text:span text:style-name="Source_20_Text">vocab</text:span><text:span text:style-name="Source_5f_Text"><text:span text:style-name="T2"><text:line-break/></text:span></text:span><text:span text:style-name="T1">Location:</text:span> <text:span text:style-name="Source_20_Text">src/env/ConfigFile.java</text:span></text:p>
      <text:p text:style-name="Text_20_body">Parses <text:span text:style-name="Source_5f_Text"><text:span text:style-name="T2">simulation.conf</text:span></text:span> using the NightConfig TOML library. Key design decisions:</text:p>
      <text:list text:style-name="L4">
        <text:list-item>
          <text:p text:style-name="P21">All settings have compile-time defaults (defined as <text:span text:style-name="Source_20_Text">static final</text:span> constants).</text:p>
        </text:list-item>
        <text:list-item>
          <text:p text:style-name="P21">Out-of-range numeric values are clamped rather than rejected.</text:p>
        </text:list-item>
        <text:list-item>
          <text:p text:style-name="P21">If <text:span text:style-name="Source_20_Text">age_start == age_finish</text:span>, <text:span text:style-name="Source_20_Text">age_finish</text:span> is incremented by 1.</text:p>
        </text:list-item>
        <text:list-item>
          <text:p text:style-name="P21">If no valid <text:span text:style-name="Source_20_Text">[[ses]]</text:span> entries exist, the three defaults are used.</text:p>
        </text:list-item>
        <text:list-item>
          <text:p text:style-name="P22">Missing or blank file paths fall back to default resource locations.</text:p>
        </text:list-item>
      </text:list>
      <text:p text:style-name="Text_20_body">Public API:</text:p>
      <text:list text:style-name="L5">
        <text:list-item>
          <text:p text:style-name="P23"><text:span text:style-name="Source_20_Text">static ConfigFile createDefault()</text:span> – Returns a ConfigFile with all defaults.</text:p>
        </text:list-item>
        <text:list-item>
          <text:p text:style-name="P23"><text:span text:style-name="Source_20_Text">static ConfigFile parse(Path configFile)</text:span> – Parses the given TOML file.</text:p>
        </text:list-item>
        <text:list-item>
          <text:p text:style-name="P23"><text:span text:style-name="Source_20_Text">Agents getAgents()</text:span> / <text:span text:style-name="Source_20_Text">HashSet&lt;SES&gt; getSES()</text:span> – Accessors.</text:p>
        </text:list-item>
      </text:list>
      <text:h text:style-name="Heading_20_2" text:outline-level="2"><text:bookmark text:name="_mcp_78557f74"/><text:bookmark-start text:name="supporting-configuration-classes"/><text:bookmark-start text:name="__RefHeading___Toc8551_3058386561"/>Supporting Classes<text:bookmark-end text:name="supporting-configuration-classes"/><text:bookmark-end text:name="__RefHeading___Toc8551_3058386561"/></text:h>
      <text:p text:style-name="Text_20_body"><text:span text:style-name="T1">Agents.java</text:span> (<text:span text:style-name="Source_20_Text">src/env/Agents.java</text:span>) Simple data holder with getters for child count, max siblings, percent single parents, age start, and age finish. Constructed by <text:span text:style-name="Source_20_Text">ConfigFile</text:span>.</text:p>
      <text:p text:style-name="Text_20_body"><text:span text:style-name="T1">SES.java</text:span> (<text:span text:style-name="Source_20_Text">src/env/SES.java</text:span>) Represents a socio-economic status category with a name and daily word quantity. Equality is determined solely by name (via <text:span text:style-name="Source_20_Text">equals</text:span>/<text:span text:style-name="Source_20_Text">hashCode</text:span> override), allowing <text:span text:style-name="Source_20_Text">HashSet</text:span> to deduplicate categories. Provides a <text:span text:style-name="Source_20_Text">defaults()</text:span> factory method returning the three standard categories.</text:p>
      <text:p text:style-name="Text_20_body"><text:span text:style-name="T1">Environment.java</text:span> (<text:span text:style-name="Source_20_Text">src/env/Environment.java</text:span>) Holds two path strings: <text:span text:style-name="Source_20_Text">utteranceLocation()</text:span> and <text:span text:style-name="Source_20_Text">bookLocation(</text:span><text:span text:style-name="Source_5f_Text"><text:span text:style-name="T2">)</text:span></text:span>.</text:p>
      <text:p text:style-name="Text_20_body"><text:span text:style-name="T1">CircularQueue.java</text:span> (<text:span text:style-name="Source_20_Text">src/env/CircularQueue.java</text:span>) Generic circular queue (<text:span text:style-name="Source_20_Text">CircularQueue&lt;T&gt;</text:span>) used for round-robin distribution of SES categories across parent agents. Supports <text:span text:style-name="Source_5f_Text"><text:span text:style-name="T2">add(</text:span></text:span><text:span text:style-name="Source_20_Text">Collection</text:span><text:span text:style-name="Source_5f_Text"><text:span text:style-name="T2">)</text:span></text:span> and <text:span text:style-name="Source_20_Text">get()</text:span> (which advances and wraps the internal pointer).</text:p>
      <text:h text:style-name="Heading_20_1" text:outline-level="1"><text:bookmark text:name="_mcp_e7aa7fb0"/><text:bookmark-start text:name="custom-launcher"/><text:bookmark-start text:name="__RefHeading___Toc8553_3058386561"/>Custom Launcher<text:bookmark-end text:name="custom-launcher"/><text:bookmark-end text:name="__RefHeading___Toc8553_3058386561"/></text:h>
      <text:h text:style-name="Heading_20_2" text:outline-level="2"><text:bookmark text:name="_mcp_d5d8eed9"/><text:bookmark-start text:name="vocablauncherjava"/><text:bookmark-start text:name="__RefHeading___Toc8555_3058386561"/>VocabLauncher.java<text:bookmark-end text:name="vocablauncherjava"/><text:bookmark-end text:name="__RefHeading___Toc8555_3058386561"/></text:h>
      <text:p text:style-name="Text_20_body"><text:span text:style-name="T1">Package:</text:span> <text:span text:style-name="Source_20_Text">vocab</text:span><text:span text:style-name="Source_5f_Text"><text:span text:style-name="T2"><text:line-break/></text:span></text:span><text:span text:style-name="T1">Location:</text:span> <text:span text:style-name="Source_20_Text">src/env/VocabLauncher.java</text:span><text:span text:style-name="Source_5f_Text"><text:span text:style-name="T2"><text:line-break/></text:span></text:span><text:span text:style-name="T1">Extends:</text:span> <text:span text:style-name="Source_20_Text">jacamo.infra.JaCaMoLauncher</text:span></text:p>
      <text:p text:style-name="Text_20_body">The custom launcher is the application entry point. It overrides <text:span text:style-name="Source_20_Text">createAgs()</text:span> to inject dynamically generated agents before JaCaMo processes the <text:span text:style-name="Source_20_Text">.jcm</text:span> file.</text:p>
      <text:h text:style-name="Heading_20_3" text:outline-level="3"><text:bookmark text:name="_mcp_c9600cc3"/><text:bookmark-start text:name="startup-sequence-within-createags"/><text:bookmark-start text:name="__RefHeading___Toc8557_3058386561"/><text:soft-page-break/>Startup sequence within <text:span text:style-name="Source_5f_Text"><text:span text:style-name="T2">createAgs()</text:span></text:span>:<text:bookmark-end text:name="startup-sequence-within-createags"/><text:bookmark-end text:name="__RefHeading___Toc8557_3058386561"/></text:h>
      <text:list xml:id="list194311138" text:style-name="L6">
        <text:list-item>
          <text:p text:style-name="P24"><text:span text:style-name="Source_20_Text">loadCustomConfig()</text:span> – Locates and parses <text:span text:style-name="Source_20_Text">simulation.conf</text:span> from the working directory.</text:p>
        </text:list-item>
        <text:list-item>
          <text:p text:style-name="P24"><text:span text:style-name="Source_20_Text">initialiseArtifacts()</text:span> – Calls static initialisers on <text:span text:style-name="Source_20_Text">DataLogger</text:span>, <text:span text:style-name="Source_20_Text">Synchroniser</text:span>, <text:span text:style-name="Source_20_Text">Utterances</text:span>, and <text:span text:style-name="Source_20_Text">Library</text:span> to pre-load data before the MAS starts.</text:p>
        </text:list-item>
        <text:list-item>
          <text:p text:style-name="P24"><text:span text:style-name="Source_20_Text">addChildAgents(</text:span><text:span text:style-name="Source_5f_Text"><text:span text:style-name="T2">)</text:span></text:span> – Creates N child agents from a template <text:span text:style-name="Source_20_Text">JaCaMoAgentParameters</text:span>:</text:p>
          <text:list text:style-name="L7">
            <text:list-item>
              <text:p text:style-name="P25">Source file: <text:span text:style-name="Source_20_Text">child.asl</text:span></text:p>
            </text:list-item>
            <text:list-item>
              <text:p text:style-name="P25"><text:bookmark text:name="_mcp_770d096c"/>Belief base: <text:span text:style-name="Source_20_Text">HashMapBB</text:span> with indexed pattern <text:span text:style-name="Source_20_Text">word(key,_)</text:span> for O(1) word lookups</text:p>
            </text:list-item>
            <text:list-item>
              <text:p text:style-name="P25">Artefact focuses: <text:span text:style-name="Source_20_Text">classroom.library</text:span>, <text:span text:style-name="Source_20_Text">sync.synchroniser</text:span>, <text:span text:style-name="Source_20_Text">sync.datalogger</text:span>, <text:span text:style-name="Source_20_Text">sync.wordsLearnt</text:span></text:p>
            </text:list-item>
            <text:list-item>
              <text:p text:style-name="P25">Role: <text:span text:style-name="Source_20_Text">child</text:span> in the <text:span text:style-name="Source_20_Text">village</text:span> group</text:p>
            </text:list-item>
            <text:list-item>
              <text:p text:style-name="P25">Initial beliefs: <text:span text:style-name="Source_20_Text">age(X)</text:span>, <text:span text:style-name="Source_20_Text">activityState("Idle")</text:span></text:p>
            </text:list-item>
            <text:list-item>
              <text:p text:style-name="P25">Initial goals: <text:span text:style-name="Source_20_Text">join_school</text:span>, <text:span text:style-name="Source_20_Text">join_home_group(home_N)</text:span> (with randomised home assignment)</text:p>
            </text:list-item>
          </text:list>
        </text:list-item>
        <text:list-item>
          <text:p text:style-name="P26"><text:span text:style-name="Source_20_Text">addParentAgents()</text:span> – Creates parent agents:</text:p>
        </text:list-item>
      </text:list>
      <text:list text:style-name="L8">
        <text:list-item>
          <text:list>
            <text:list-item>
              <text:p text:style-name="P27"><text:bookmark text:name="_mcp_de488a20"/>Belief base: <text:span text:style-name="Source_20_Text">HashMapBB</text:span> with indexed patterns <text:span text:style-name="Source_20_Text">words_to_speak(_)</text:span> and <text:span text:style-name="Source_20_Text">iterationsLeft(_)</text:span></text:p>
            </text:list-item>
          </text:list>
        </text:list-item>
      </text:list>
      <text:list xml:id="list161155711929301" text:continue-list="list194311138" text:style-name="L9">
        <text:list-item>
          <text:list>
            <text:list-item>
              <text:p text:style-name="P28">Total parents = <text:span text:style-name="Source_20_Text">numFamily * (1 + (100 - percentSingleParents) / 100)</text:span></text:p>
            </text:list-item>
            <text:list-item>
              <text:p text:style-name="P28">First <text:span text:style-name="Source_20_Text">numFamily</text:span> parents get <text:span text:style-name="Source_20_Text">create_home_group(N)</text:span> goal and SES assignment via circular queue.</text:p>
            </text:list-item>
            <text:list-item>
              <text:p text:style-name="P28">Extra parents (for two-parent households) get <text:span text:style-name="Source_20_Text">join_home_group(home_N)</text:span> goal.</text:p>
            </text:list-item>
            <text:list-item>
              <text:p text:style-name="P28">The SES queue starting position is randomised to avoid deterministic assignment.</text:p>
            </text:list-item>
          </text:list>
        </text:list-item>
        <text:list-item text:style-override="L6">
          <text:p text:style-name="P24"><text:span text:style-name="Source_20_Text">addSiblingAgents(</text:span><text:span text:style-name="Source_5f_Text"><text:span text:style-name="T2">)</text:span></text:span> – Placeholder; not implemented.</text:p>
        </text:list-item>
        <text:list-item text:style-override="L6">
          <text:p text:style-name="P24"><text:span text:style-name="Source_20_Text">super.createAgs()</text:span> – Standard JaCaMo agent creation from the <text:span text:style-name="Source_20_Text">.jcm</text:span> file (creates the teacher agent).</text:p>
        </text:list-item>
      </text:list>
      <text:h text:style-name="Heading_20_3" text:outline-level="3"><text:bookmark text:name="_mcp_b5a52500"/><text:bookmark-start text:name="key-design-note"/><text:bookmark-start text:name="__RefHeading___Toc8559_3058386561"/>Key design note:<text:bookmark-end text:name="key-design-note"/><text:bookmark-end text:name="__RefHeading___Toc8559_3058386561"/></text:h>
      <text:p text:style-name="P29">The <text:span text:style-name="Source_20_Text">main()</text:span> method is a near-verbatim copy of <text:span text:style-name="Source_20_Text">JaCaMoLauncher.main()</text:span>, changed only to instantiate <text:span text:style-name="Source_20_Text">VocabLauncher</text:span> instead of <text:span text:style-name="Source_20_Text">JaCaMoLauncher</text:span>. The <text:span text:style-name="Source_20_Text">create()</text:span> method is also overridden to remove the <text:span text:style-name="Source_20_Text">createController()</text:span> call. The <text:span text:style-name="Source_20_Text">createCustomPlatforms()</text:span> method is also copied because it is <text:span text:style-name="Source_20_Text">private</text:span> in the parent class.</text:p>
      <text:h text:style-name="Heading_20_1" text:outline-level="1"><text:bookmark text:name="_mcp_88b3e722"/><text:bookmark-start text:name="agent-layer"/><text:bookmark-start text:name="__RefHeading___Toc8561_3058386561"/>Agent Layer (Jason / AgentSpeak)<text:bookmark-end text:name="agent-layer"/><text:bookmark-end text:name="__RefHeading___Toc8561_3058386561"/></text:h>
      <text:p text:style-name="Text_20_body">All agents are written in AgentSpeak(L), Jason’s agent programming language. Agents operate on a BDI (Belief-Desire-Intention) cycle: they maintain beliefs about the world, adopt goals (desires), and select plans (intentions) to achieve those goals.</text:p>
      <text:h text:style-name="Heading_20_2" text:outline-level="2"><text:bookmark text:name="_mcp_825a29c9"/><text:bookmark-start text:name="common-includes"/><text:bookmark-start text:name="__RefHeading___Toc8563_3058386561"/>Common Includes<text:bookmark-end text:name="common-includes"/><text:bookmark-end text:name="__RefHeading___Toc8563_3058386561"/></text:h>
      <text:h text:style-name="P30" text:outline-level="3"><text:bookmark text:name="_mcp_d7808ff6"/><text:bookmark-start text:name="__RefHeading___Toc8565_3058386561"/><text:bookmark-start text:name="common.asl-srcagtinccommon.asl"/>common.asl<text:bookmark-end text:name="__RefHeading___Toc8565_3058386561"/></text:h>
      <text:p text:style-name="Text_20_body"><text:span text:style-name="T3">File: </text:span><text:span text:style-name="Source_20_Text">src/agt/inc/common.asl</text:span><text:bookmark-end text:name="common.asl-srcagtinccommon.asl"/></text:p>
      <text:p text:style-name="Text_20_body">Included by all agents. Provides:</text:p>
      <text:list text:style-name="L10">
        <text:list-item>
          <text:p text:style-name="P31">Standard JaCaMo template includes (<text:span text:style-name="Source_20_Text">common-cartago.asl</text:span>, <text:span text:style-name="Source_20_Text">common-moise.asl</text:span>, <text:span text:style-name="Source_20_Text">org-obedient.asl</text:span>).</text:p>
        </text:list-item>
        <text:list-item>
          <text:p text:style-name="P31"><text:span text:style-name="Source_20_Text">print_listItems</text:span> – A recursive plan for printing list contents to the console (debugging utility).</text:p>
        </text:list-item>
      </text:list>
      <text:h text:style-name="P30" text:outline-level="3"><text:bookmark text:name="_mcp_cc1e0c04"/><text:bookmark-start text:name="__RefHeading___Toc8567_3058386561"/><text:bookmark-start text:name="child_common.asl-srcagtincchild_common.asl"/>child_common.asl<text:bookmark-end text:name="__RefHeading___Toc8567_3058386561"/></text:h>
      <text:p text:style-name="Text_20_body"><text:span text:style-name="T3">File: </text:span><text:span text:style-name="Source_20_Text">src/agt/inc/child_common.asl</text:span><text:bookmark-end text:name="child_common.asl-srcagtincchild_common.asl"/></text:p>
      <text:p text:style-name="Text_20_body">Included by <text:span text:style-name="Source_20_Text">child.asl</text:span>. Provides:</text:p>
      <text:list text:style-name="L11">
        <text:list-item>
          <text:p text:style-name="P32"><text:span text:style-name="Source_20_Text">setState(State)</text:span><text:span text:style-name="T1">:</text:span> Updates the <text:span text:style-name="Source_20_Text">activityState</text:span> belief.</text:p>
        </text:list-item>
        <text:list-item>
          <text:p text:style-name="P32"><text:span text:style-name="Source_20_Text">join_home_group(HomeGroup)</text:span><text:span text:style-name="T1">:</text:span> Waits for the Moise group to exist, then focuses on it and adopts the <text:span text:style-name="Source_20_Text">offspring</text:span> role.</text:p>
        </text:list-item>
        <text:list-item>
          <text:p text:style-name="P32"><text:span text:style-name="Source_20_Text">join_school</text:span><text:span text:style-name="T1">:</text:span> Waits for the classroom group, then focuses and adopts the <text:span text:style-name="Source_5f_Text"><text:span text:style-name="T2">student</text:span></text:span> role.</text:p>
        </text:list-item>
        <text:list-item>
          <text:p text:style-name="P32"><text:soft-page-break/><text:span text:style-name="Source_20_Text">+sync::newYear (atomic)</text:span>: At year-end, waits until idle, then retrieves aggregate statistics by querying the belief base (<text:span text:style-name="Source_20_Text">words::unique_seen</text:span>, <text:span text:style-name="Source_20_Text">words::unique_heard</text:span>, and <text:span text:style-name="Source_20_Text">.count</text:span> of learned words) and reports them to <text:span text:style-name="Source_20_Text">DataLogger</text:span> via <text:span text:style-name="Source_20_Text">addAnnualStats</text:span>.</text:p>
        </text:list-item>
        <text:list-item>
          <text:p text:style-name="P32"><text:span text:style-name="Source_20_Text">+sync::finalise (atomic)</text:span>: At simulation end, retrieves all learned words via <text:span text:style-name="Source_20_Text">.findall(aoa(Word,Age), words::word(Word,[_,_,Age]) &amp; Age\==0, WordAoA)</text:span> and reports them to <text:span text:style-name="Source_20_Text">WordsLearnt</text:span> via <text:span text:style-name="Source_20_Text">addLearnedWords</text:span>, then signals <text:span text:style-name="Source_20_Text">childAgentFinalised</text:span>.</text:p>
        </text:list-item>
        <text:list-item>
          <text:p text:style-name="P32"><text:span text:style-name="Source_20_Text">+sync::agent_age(NewAge)</text:span><text:span text:style-name="T1"> (atomic):</text:span> Updates the agent’s <text:span text:style-name="Source_20_Text">age</text:span> belief when the synchroniser increments the age.</text:p>
        </text:list-item>
      </text:list>
      <text:h text:style-name="P30" text:outline-level="3"><text:bookmark text:name="_mcp_c5a1dc2b"/><text:bookmark-start text:name="__RefHeading___Toc8569_3058386561"/><text:bookmark-start text:name="adult_common.asl-srcagtincadult_common.asl"/>adult_common.asl<text:bookmark-end text:name="__RefHeading___Toc8569_3058386561"/></text:h>
      <text:p text:style-name="Text_20_body"><text:span text:style-name="T3">File: </text:span><text:span text:style-name="Source_20_Text">src/agt/inc/adult_common.asl</text:span><text:bookmark-end text:name="adult_common.asl-srcagtincadult_common.asl"/></text:p>
      <text:p text:style-name="Text_20_body">Included by <text:span text:style-name="Source_20_Text">parent.asl</text:span> and <text:span text:style-name="Source_20_Text">teacher.asl</text:span>. Provides:</text:p>
      <text:list text:style-name="L12">
        <text:list-item>
          <text:p text:style-name="P33"><text:span text:style-name="Source_20_Text">read_book_aloud_to_child(Title, Child)</text:span> – Retrieves book text from the Library artefact and sends it to the child via <text:span text:style-name="Source_5f_Text"><text:span text:style-name="T2">listen_to_speech</text:span></text:span>.</text:p>
        </text:list-item>
      </text:list>
      <text:h text:style-name="Heading_20_2" text:outline-level="2"><text:bookmark text:name="_mcp_cfcd2c5a"/><text:bookmark-start text:name="child-agent"/><text:bookmark-start text:name="__RefHeading___Toc8571_3058386561"/>Child Agent<text:bookmark-end text:name="child-agent"/><text:bookmark-end text:name="__RefHeading___Toc8571_3058386561"/></text:h>
      <text:p text:style-name="Text_20_body"><text:span text:style-name="T1">File:</text:span> <text:span text:style-name="Source_20_Text">src/agt/child.asl</text:span><text:span text:style-name="Source_5f_Text"><text:span text:style-name="T2"><text:line-break/></text:span></text:span><text:span text:style-name="T1">Includes:</text:span> <text:span text:style-name="Source_20_Text">child_common.asl</text:span></text:p>
      <text:h text:style-name="Heading_20_3" text:outline-level="3"><text:bookmark text:name="_mcp_e0c582eb"/><text:bookmark-start text:name="__RefHeading___Toc8573_3058386561"/><text:span text:style-name="T4">Word data</text:span><text:bookmark-start text:name="belief-structure"/> structure<text:bookmark-end text:name="__RefHeading___Toc8573_3058386561"/><text:bookmark-end text:name="belief-structure"/></text:h>
      <text:p text:style-name="P34">Each word is tracked as a belief in the words namespace: words::word(Word,[Seen,Heard,AgeLearned]), where:</text:p>
      <text:list text:style-name="L13">
        <text:list-item>
          <text:p text:style-name="P35"><text:span text:style-name="Source_20_Text">Seen</text:span> – number of times the word has been encountered in books</text:p>
        </text:list-item>
      </text:list>
      <text:list text:style-name="L14">
        <text:list-item>
          <text:p text:style-name="P36"><text:span text:style-name="Source_20_Text">Heard</text:span> – number of times the word has been encountered in speech</text:p>
        </text:list-item>
        <text:list-item>
          <text:p text:style-name="P37"><text:span text:style-name="Source_20_Text">AgeLearned</text:span> – the age at which the word was "learnt" (0 if not yet learnt)</text:p>
        </text:list-item>
      </text:list>
      <text:p text:style-name="Text_20_body">Word data is stored in the agent's belief base using <text:span text:style-name="Source_20_Text">HashMapBB</text:span> – a custom belief base implementation (see <text:bookmark-ref text:reference-format="text" text:ref-name="__RefHeading___Toc8661_3058386561">Concurrency and Synchronisation</text:bookmark-ref>) that provides O(1) indexed lookups by word. The first time a word is queried, a test-goal plan in <text:span text:style-name="Source_20_Text">child_common.asl</text:span> creates the initial belief with zeroed counters.</text:p>
      <text:h text:style-name="Heading_20_3" text:outline-level="3"><text:bookmark text:name="_mcp_e9229eb5"/><text:bookmark-start text:name="plans"/><text:bookmark-start text:name="__RefHeading___Toc8575_3058386561"/>Plans<text:bookmark-end text:name="plans"/><text:bookmark-end text:name="__RefHeading___Toc8575_3058386561"/></text:h>
      <text:p text:style-name="Text_20_body"><text:span text:style-name="Source_20_Text">word_heard_checker(Word)</text:span> – Queries the word's belief via <text:span text:style-name="Source_20_Text">?words::word(Word,[Seen,Heard,AgeLearned])</text:span>. If this is the first time the word has been heard (<text:span text:style-name="Source_20_Text">Heard == 0</text:span>), increments the <text:span text:style-name="Source_20_Text">words::unique_heard</text:span> counter. Then updates the word belief with the incremented Heard count via <text:span text:style-name="Source_20_Text">+words::word(Word,[Seen,Heard+1,AgeLearned])</text:span>.</text:p>
      <text:p text:style-name="Text_20_body"><text:span text:style-name="Source_20_Text">word_seen_checker(Word)</text:span> – Same as above but for the <text:span text:style-name="Source_20_Text">Seen</text:span> count and <text:span text:style-name="Source_20_Text">words::unique_seen</text:span> counter.</text:p>
      <text:p text:style-name="Text_20_body"><text:span text:style-name="Source_20_Text">try_learn_word(Word)</text:span> – Queries the word's belief. If <text:span text:style-name="Source_20_Text">AgeLearned == 0</text:span> and the word meets the learning threshold (see <text:bookmark-ref text:reference-format="text" text:ref-name="__RefHeading___Toc8659_3058386561">Word Learning Algorithm</text:bookmark-ref>), updates the belief to set <text:span text:style-name="Source_20_Text">AgeLearned</text:span> to the child's current age.</text:p>
      <text:p text:style-name="Text_20_body"><text:span text:style-name="Source_20_Text">read_a_book(Title)</text:span><text:span text:style-name="T1"> [source guard: must come from the teacher]</text:span> – Retrieves book text from the Library, iterates over each word calling <text:span text:style-name="Source_20_Text">word_seen_checker</text:span> and <text:span text:style-name="Source_20_Text">try_learn_word</text:span>, then notifies the teacher of completion via <text:span text:style-name="Source_20_Text">finished</text:span><text:span text:style-name="Source_20_Text"><text:span text:style-name="T5">Reading</text:span></text:span><text:span text:style-name="Source_20_Text">(Title)</text:span>.</text:p>
      <text:p text:style-name="Text_20_body"><text:span text:style-name="Source_20_Text">+listen_to_speech(Words)</text:span><text:span text:style-name="T1"> [atomic]</text:span> – Triggered when another agent (typically the teacher) speaks words directly. Iterates over the word list, calls <text:span text:style-name="Source_20_Text">word_heard_checker</text:span> and <text:span text:style-name="Source_20_Text">try_learn_word</text:span> for each, then sends <text:span text:style-name="Source_20_Text">finishedListening</text:span> to the speaker.</text:p>
      <text:p text:style-name="Text_20_body"><text:span text:style-name="Source_20_Text">+listen_to_utterances(Utterances, Counter)</text:span><text:span text:style-name="T1"> [atomic]</text:span> – Triggered by parent agents. Processes a batch of utterances (list of word lists). After processing, records a <text:span text:style-name="Source_20_Text">finished(Counter, Parent)</text:span> belief. The corresponding <text:span text:style-name="Source_20_Text">+finished(_,Parent)</text:span> plan waits until 20 batches have been received before sending <text:soft-page-break/><text:span text:style-name="Source_20_Text">finishedUtterances</text:span> back to the parent. This batching approach (20 iterations) prevents the agent’s belief base from being overwhelmed by a single enormous message.</text:p>
      <text:h text:style-name="Heading_20_2" text:outline-level="2"><text:bookmark text:name="_mcp_b32fd1e0"/><text:bookmark-start text:name="parent-agent"/><text:bookmark-start text:name="__RefHeading___Toc8577_3058386561"/>Parent Agent<text:bookmark-end text:name="parent-agent"/><text:bookmark-end text:name="__RefHeading___Toc8577_3058386561"/></text:h>
      <text:p text:style-name="Text_20_body"><text:span text:style-name="T1">File:</text:span> <text:span text:style-name="Source_20_Text">src/agt/parent.asl</text:span><text:span text:style-name="Source_5f_Text"><text:span text:style-name="T2"><text:line-break/></text:span></text:span><text:span text:style-name="T1">Includes:</text:span> <text:span text:style-name="Source_20_Text">adult_common.asl</text:span></text:p>
      <text:h text:style-name="Heading_20_3" text:outline-level="3"><text:bookmark text:name="_mcp_b0c631fa"/><text:bookmark-start text:name="plans-1"/><text:bookmark-start text:name="__RefHeading___Toc8579_3058386561"/>Plans<text:bookmark-end text:name="plans-1"/><text:bookmark-end text:name="__RefHeading___Toc8579_3058386561"/></text:h>
      <text:p text:style-name="Text_20_body"><text:span text:style-name="Source_20_Text">create_home_group(Number)</text:span> – Creates a Moise sub-group (<text:span text:style-name="Source_20_Text">indv_home</text:span>) under the <text:span text:style-name="Source_20_Text">village</text:span> group:</text:p>
      <text:list text:style-name="L15">
        <text:list-item>
          <text:p text:style-name="P38">Looks up and focuses on the village artefact.</text:p>
        </text:list-item>
        <text:list-item>
          <text:p text:style-name="P38">Creates a new group named <text:span text:style-name="Source_20_Text">home_N</text:span>.</text:p>
        </text:list-item>
        <text:list-item>
          <text:p text:style-name="P38">Adopts the <text:span text:style-name="Source_20_Text">parent</text:span> role.</text:p>
        </text:list-item>
        <text:list-item>
          <text:p text:style-name="P38">Waits for the group to be well-formed.</text:p>
        </text:list-item>
        <text:list-item>
          <text:p text:style-name="P38">Waits for all expected parents to join (via <text:span text:style-name="Source_20_Text">find_parents</text:span>).</text:p>
        </text:list-item>
        <text:list-item>
          <text:p text:style-name="P38">Distributes household information (parent list, SES) to all residents.</text:p>
        </text:list-item>
        <text:list-item>
          <text:p text:style-name="P39">Signals the synchroniser via <text:span text:style-name="Source_20_Text">groupCreated</text:span>.</text:p>
        </text:list-item>
      </text:list>
      <text:p text:style-name="Text_20_body"><text:span text:style-name="Source_20_Text">join_home_group(GroupName)</text:span> – For second parents in two-parent households. Waits for the group to exist, then focuses and adopts the <text:span text:style-name="Source_5f_Text"><text:span text:style-name="T2">parent</text:span></text:span> role.</text:p>
      <text:p text:style-name="Text_20_body"><text:span text:style-name="Source_20_Text">find_parents(NumParents)</text:span> – Recursive plan that checks if the expected number of parents have joined. On failure, waits 100ms and retries.</text:p>
      <text:p text:style-name="Text_20_body"><text:span text:style-name="Source_20_Text">+sync::status("StartHome")</text:span> – Triggered by the synchroniser. Delegates to <text:span text:style-name="Source_20_Text">speak_to_child</text:span>.</text:p>
      <text:p text:style-name="P40"><text:span text:style-name="Source_20_Text">speak_to_child</text:span><text:span text:style-name="T1"> [atomic]</text:span> – Core speech delivery plan:</text:p>
      <text:list text:style-name="L16">
        <text:list-item>
          <text:p text:style-name="P41">Determines the total daily word count from SES configuration.</text:p>
        </text:list-item>
        <text:list-item>
          <text:p text:style-name="P41">Divides by the number of parents in the household.</text:p>
        </text:list-item>
        <text:list-item>
          <text:p text:style-name="P41">Delivers words in 20 iterations, each requesting <text:span text:style-name="Source_20_Text">DesiredWords = RemainingWords / Counter</text:span> words from the <text:span text:style-name="Source_20_Text">Utterances</text:span> artefact via <text:span text:style-name="Source_20_Text">getBulkUtterances</text:span>.</text:p>
        </text:list-item>
        <text:list-item>
          <text:p text:style-name="P42">Sends each batch to the child via <text:span text:style-name="Source_20_Text">listen_to_utterances</text:span>.</text:p>
        </text:list-item>
      </text:list>
      <text:p text:style-name="Text_20_body"><text:span text:style-name="Source_20_Text">+finishedUtterances</text:span> – Triggered when the child confirms all 20 batches processed. <text:span text:style-name="T5">Removes the</text:span> Signals <text:span text:style-name="Source_20_Text">finishedHome</text:span> to the synchroniser.</text:p>
      <text:h text:style-name="Heading_20_2" text:outline-level="2"><text:bookmark text:name="_mcp_f6af25f1"/><text:bookmark-start text:name="teacher-agent"/><text:bookmark-start text:name="__RefHeading___Toc8581_3058386561"/>Teacher Agent<text:bookmark-end text:name="teacher-agent"/><text:bookmark-end text:name="__RefHeading___Toc8581_3058386561"/></text:h>
      <text:p text:style-name="Text_20_body"><text:span text:style-name="T1">File:</text:span> <text:span text:style-name="Source_20_Text">src/agt/teacher.asl</text:span><text:span text:style-name="Source_5f_Text"><text:span text:style-name="T2"><text:line-break/></text:span></text:span><text:span text:style-name="T1">Includes:</text:span> <text:span text:style-name="Source_20_Text">adult_common.asl</text:span></text:p>
      <text:p text:style-name="Text_20_body">The teacher agent is the only statically-defined agent (declared in the <text:span text:style-name="Source_20_Text">.jcm</text:span> file rather than dynamically created).</text:p>
      <text:h text:style-name="Heading_20_3" text:outline-level="3"><text:bookmark text:name="_mcp_2b1ce7d3"/><text:bookmark-start text:name="initial-belief"/><text:bookmark-start text:name="__RefHeading___Toc8583_3058386561"/>Initial belief<text:bookmark-end text:name="initial-belief"/><text:bookmark-end text:name="__RefHeading___Toc8583_3058386561"/></text:h>
      <text:p text:style-name="Text_20_body"><text:span text:style-name="Source_20_Text">students_found(0)</text:span> – tracks how many students are in the class.</text:p>
      <text:h text:style-name="Heading_20_3" text:outline-level="3"><text:bookmark text:name="_mcp_ec4d4065"/><text:bookmark-start text:name="plans-2"/><text:bookmark-start text:name="__RefHeading___Toc8585_3058386561"/>Plans<text:bookmark-end text:name="plans-2"/><text:bookmark-end text:name="__RefHeading___Toc8585_3058386561"/></text:h>
      <text:p text:style-name="Text_20_body"><text:span text:style-name="Source_20_Text">find_my_students</text:span> – Waits for the synchroniser to reach “Ready” status, then:</text:p>
      <text:list text:style-name="L17">
        <text:list-item>
          <text:p text:style-name="P43">Queries the classroom group for all agents playing the <text:span text:style-name="Source_20_Text">student</text:span> role.</text:p>
        </text:list-item>
        <text:list-item>
          <text:p text:style-name="P43">Records the student list and count.</text:p>
        </text:list-item>
        <text:list-item>
          <text:p text:style-name="P43">Sends each student a belief identifying this agent as their teacher (<text:span text:style-name="Source_20_Text">school::my_teacher(Me)</text:span>).</text:p>
        </text:list-item>
        <text:list-item>
          <text:p text:style-name="P44"><text:soft-page-break/>Signals <text:span text:style-name="Source_20_Text">schoolReady</text:span> to the synchroniser.</text:p>
        </text:list-item>
      </text:list>
      <text:p text:style-name="Text_20_body"><text:span text:style-name="Source_20_Text">read_books</text:span><text:span text:style-name="T1"> [atomic]</text:span> – The main daily plan, triggered by <text:span text:style-name="Source_5f_Text"><text:span text:style-name="T2">StartSchool</text:span></text:span>:</text:p>
      <text:list xml:id="list28245414" text:style-name="L18">
        <text:list-item>
          <text:p text:style-name="P45">Signals <text:span text:style-name="Source_20_Text">startSchool</text:span> to the synchroniser.</text:p>
        </text:list-item>
        <text:list-item>
          <text:p text:style-name="P45">Checks the children’s age and selects a strategy:</text:p>
          <text:list text:style-name="L19">
            <text:list-item>
              <text:p text:style-name="P46">Age &lt; 5: Always reads aloud (<text:span text:style-name="Source_20_Text">read_book_aloud_to_child</text:span>).</text:p>
            </text:list-item>
            <text:list-item>
              <text:p text:style-name="P46">Age 5–7: 50% chance of reading aloud vs. telling students to read independently.</text:p>
            </text:list-item>
            <text:list-item>
              <text:p text:style-name="P47">Age &gt; 7: Always tells students to read independently.</text:p>
            </text:list-item>
          </text:list>
        </text:list-item>
      </text:list>
      <text:p text:style-name="Text_20_body"><text:span text:style-name="Source_20_Text">tell_students_to_read_book</text:span><text:span text:style-name="Strong_20_Emphasis"> [atomic] </text:span>– Selects a random book title, retrieves its word count, sends an <text:span text:style-name="Source_20_Text">achieve</text:span> goal (<text:span text:style-name="Source_20_Text">read_a_book(Title)</text:span>) to all students, and records <text:span text:style-name="Source_20_Text">sent_instruction_to_read_book(Title, Student)</text:span> beliefs. Has a failure plan that silently succeeds if preconditions are not met.</text:p>
      <text:p text:style-name="Text_20_body"><text:span text:style-name="Source_20_Text">+finishedListening</text:span><text:span text:style-name="Strong_20_Emphasis"> [atomic] </text:span>– Triggered when a child finishes listening to a read-aloud session. Tracks completion via <text:span text:style-name="Source_20_Text">finished(Child)</text:span> beliefs. When all students have reported, cleans up beliefs and signals <text:span text:style-name="Source_20_Text">finishSchool</text:span> to the synchroniser.</text:p>
      <text:p text:style-name="Text_20_body"><text:span text:style-name="Source_20_Text">+finishedReading(Title)</text:span><text:span text:style-name="Strong_20_Emphasis"> [atomic] </text:span>– Triggered when a child finishes reading a book independently. Tracks completion by counting <text:span text:style-name="Source_20_Text">finishedReading</text:span> beliefs. When all students have reported, cleans up <text:span text:style-name="Source_20_Text">finishedReading</text:span> and <text:span text:style-name="Source_20_Text">sent_instruction_to_read_book</text:span> beliefs and signals <text:span text:style-name="Source_20_Text">finishSchool</text:span> to the synchroniser.</text:p>
      <text:p text:style-name="Text_20_body"><text:span text:style-name="Source_20_Text">+sync::status("StartSchool")</text:span> – Resets the <text:span text:style-name="Source_20_Text">read_books</text:span> goal for each new day via <text:span text:style-name="Source_20_Text">resetGoal</text:span>.</text:p>
      <text:h text:style-name="Heading_20_1" text:outline-level="1"><text:bookmark text:name="_mcp_71fa7a53"/><text:bookmark-start text:name="environment-layer"/><text:bookmark-start text:name="__RefHeading___Toc8587_3058386561"/>Environment Layer (CArtAgO Artefacts)<text:bookmark-end text:name="environment-layer"/><text:bookmark-end text:name="__RefHeading___Toc8587_3058386561"/></text:h>
      <text:p text:style-name="Text_20_body">All artefacts extend <text:span text:style-name="Source_20_Text">cartago.Artifact</text:span> and reside in the <text:span text:style-name="Source_20_Text">vocab</text:span> package.</text:p>
      <text:h text:style-name="Heading_20_2" text:outline-level="2"><text:bookmark text:name="_mcp_6c84a62b"/><text:bookmark-start text:name="libraryjava"/><text:bookmark-start text:name="__RefHeading___Toc8589_3058386561"/>Library.java<text:bookmark-end text:name="libraryjava"/><text:bookmark-end text:name="__RefHeading___Toc8589_3058386561"/></text:h>
      <text:p text:style-name="Text_20_body"><text:span text:style-name="T1">Location:</text:span> <text:span text:style-name="Source_20_Text">src/env/Library.java</text:span><text:span text:style-name="Source_5f_Text"><text:span text:style-name="T2"><text:line-break/></text:span></text:span><text:span text:style-name="T1">Workspace:</text:span> <text:span text:style-name="Source_20_Text">classroom</text:span></text:p>
      <text:p text:style-name="Text_20_body">Manages the corpus of book texts.</text:p>
      <text:h text:style-name="Heading_20_3" text:outline-level="3"><text:bookmark text:name="_mcp_02880c53"/><text:bookmark-start text:name="data-structures"/><text:bookmark-start text:name="__RefHeading___Toc8591_3058386561"/>Data structures<text:bookmark-end text:name="data-structures"/><text:bookmark-end text:name="__RefHeading___Toc8591_3058386561"/></text:h>
      <text:list text:style-name="L20">
        <text:list-item>
          <text:p text:style-name="P48"><text:span text:style-name="Source_20_Text">HashMap&lt;String, String[]&gt; books</text:span> – Maps filename to pre-split word arrays. Populated lazily on first access to each book.</text:p>
        </text:list-item>
        <text:list-item>
          <text:p text:style-name="P48"><text:span text:style-name="Source_20_Text">ArrayList&lt;String&gt; bookTitles</text:span> – List of book filenames. Populated during static initialisation.</text:p>
        </text:list-item>
        <text:list-item>
          <text:p text:style-name="P49"><text:span text:style-name="Source_20_Text">ReentrantLock loadingLock</text:span> – Ensures thread-safe lazy loading.</text:p>
        </text:list-item>
      </text:list>
      <text:h text:style-name="Heading_20_3" text:outline-level="3"><text:bookmark text:name="_mcp_4cf2bc63"/><text:bookmark-start text:name="static-initialisation"/><text:bookmark-start text:name="__RefHeading___Toc8593_3058386561"/>Static initialisation<text:bookmark-end text:name="static-initialisation"/><text:bookmark-end text:name="__RefHeading___Toc8593_3058386561"/></text:h>
      <text:p text:style-name="Text_20_body"><text:span text:style-name="Source_20_Text">loadBookTitles(String path)</text:span> – Called by <text:span text:style-name="Source_20_Text">VocabLauncher.initialiseArtifacts()</text:span>. Scans the specified directory for <text:span text:style-name="Source_20_Text">.txt</text:span> files and stores their filenames <text:span text:style-name="T6">in the </text:span><text:span text:style-name="Source_20_Text"><text:span text:style-name="T6">bookTitles</text:span></text:span><text:span text:style-name="T6"> list</text:span>.</text:p>
      <text:h text:style-name="Heading_20_3" text:outline-level="3"><text:bookmark text:name="_mcp_cae5007e"/><text:bookmark-start text:name="observable-properties"/><text:bookmark-start text:name="__RefHeading___Toc8595_3058386561"/>Observable properties<text:bookmark-end text:name="observable-properties"/><text:bookmark-end text:name="__RefHeading___Toc8595_3058386561"/></text:h>
      <text:list text:style-name="L21">
        <text:list-item>
          <text:p text:style-name="P50"><text:span text:style-name="Source_20_Text">book_count</text:span> – Total number of books available.</text:p>
        </text:list-item>
      </text:list>
      <text:h text:style-name="Heading_20_3" text:outline-level="3"><text:bookmark text:name="_mcp_62ee349e"/><text:bookmark-start text:name="operations"/><text:bookmark-start text:name="__RefHeading___Toc8597_3058386561"/>Operations<text:bookmark-end text:name="operations"/><text:bookmark-end text:name="__RefHeading___Toc8597_3058386561"/></text:h>
      <text:p text:style-name="Text_20_body"><text:span text:style-name="Source_20_Text">get_bookTitleRandomly()</text:span> – Returns a random book filename.</text:p>
      <text:p text:style-name="Text_20_body"><text:soft-page-break/><text:span text:style-name="Source_20_Text">get_bookByTitle(String title)</text:span> – Returns the book’s text as a <text:span text:style-name="Source_20_Text">String[]</text:span> (<text:span text:style-name="T6">pre-split word array</text:span>). If the book hasn’t been loaded yet, acquires <text:span text:style-name="Source_20_Text">loadingLock</text:span> and reads the file from disk. Handles UTF-8 BOM (byte order mark: <text:span text:style-name="Source_20_Text">EF BB BF</text:span>).</text:p>
      <text:p text:style-name="Text_20_body"><text:span text:style-name="Source_20_Text">getWordCountByBookTitle(String title)</text:span> – Returns the word count of a book (loads the book if necessary). This exists because Jason’s <text:span text:style-name="Source_20_Text">.length</text:span> internal action causes a <text:span text:style-name="Source_20_Text">StackOverflowError</text:span> on very long lists.</text:p>
      <text:h text:style-name="Heading_20_2" text:outline-level="2"><text:bookmark text:name="_mcp_9599b50d"/><text:bookmark-start text:name="utterancesjava"/><text:bookmark-start text:name="__RefHeading___Toc8599_3058386561"/>Utterances.java<text:bookmark-end text:name="utterancesjava"/><text:bookmark-end text:name="__RefHeading___Toc8599_3058386561"/></text:h>
      <text:p text:style-name="Text_20_body"><text:span text:style-name="T1">Location:</text:span> <text:span text:style-name="Source_20_Text">src/env/Utterances.java</text:span><text:span text:style-name="Source_5f_Text"><text:span text:style-name="T2"><text:line-break/></text:span></text:span><text:span text:style-name="T1">Workspace:</text:span> <text:span text:style-name="Source_20_Text">home_environ</text:span></text:p>
      <text:p text:style-name="Text_20_body">Manages the corpus of child-directed speech utterances.</text:p>
      <text:h text:style-name="Heading_20_3" text:outline-level="3"><text:bookmark text:name="_mcp_75f03ad0"/><text:bookmark-start text:name="data-structures-1"/><text:bookmark-start text:name="__RefHeading___Toc8601_3058386561"/>Data structures<text:bookmark-end text:name="data-structures-1"/><text:bookmark-end text:name="__RefHeading___Toc8601_3058386561"/></text:h>
      <text:list text:style-name="L22">
        <text:list-item>
          <text:p text:style-name="P51"><text:span text:style-name="Source_20_Text">HashMap&lt;String, ArrayList&lt;String[]&gt;&gt; utterancesMap</text:span> – Maps speaker codes to lists of pre-split utterance word arrays.</text:p>
        </text:list-item>
        <text:list-item>
          <text:p text:style-name="P52"><text:span text:style-name="Source_20_Text">HashMap&lt;String, ArrayList&lt;String&gt;&gt; participantRoleToCodeMapping</text:span> – Maps participant roles to speaker code lists.</text:p>
        </text:list-item>
      </text:list>
      <text:h text:style-name="Heading_20_3" text:outline-level="3"><text:bookmark text:name="_mcp_7d532d08"/><text:bookmark-start text:name="static-initialisation-1"/><text:bookmark-start text:name="__RefHeading___Toc8603_3058386561"/>Static initialisation<text:bookmark-end text:name="static-initialisation-1"/><text:bookmark-end text:name="__RefHeading___Toc8603_3058386561"/></text:h>
      <text:p text:style-name="Text_20_body"><text:span text:style-name="Source_20_Text">loadUtterances(String filePath)</text:span> – Called by <text:span text:style-name="Source_5f_Text"><text:span text:style-name="T2">VocabLauncher</text:span></text:span>. Delegates to:</text:p>
      <text:list text:style-name="L23">
        <text:list-item>
          <text:p text:style-name="P53"><text:span text:style-name="Source_20_Text">loadUtterances()</text:span> – Processes CSV files containing <text:span text:style-name="Source_20_Text">utterances</text:span> in their filename, extracting <text:span text:style-name="Source_20_Text">speaker_code</text:span> and <text:span text:style-name="Source_20_Text">gloss</text:span> columns. Utterances are pre-split into <text:span text:style-name="Source_20_Text">String[]</text:span> word arrays during loading to avoid repeated splitting at access time.</text:p>
        </text:list-item>
        <text:list-item>
          <text:p text:style-name="P54"><text:span text:style-name="Source_20_Text">loadParticipants()</text:span> – Processes CSV files containing <text:span text:style-name="Source_5f_Text"><text:span text:style-name="T2">participants</text:span></text:span> in their filename, extracting <text:span text:style-name="Source_20_Text">role</text:span> and <text:span text:style-name="Source_20_Text">id</text:span> columns.</text:p>
        </text:list-item>
      </text:list>
      <text:p text:style-name="Text_20_body">Both use the private helper <text:span text:style-name="Source_20_Text">HashMapFromCSVFiles()</text:span> which:</text:p>
      <text:list text:style-name="L24">
        <text:list-item>
          <text:p text:style-name="P55">Validates the base path exists and is a directory.</text:p>
        </text:list-item>
        <text:list-item>
          <text:p text:style-name="P55">Filters files by <text:span text:style-name="Source_20_Text">.csv</text:span> extension and filename substring.</text:p>
        </text:list-item>
        <text:list-item>
          <text:p text:style-name="P55">Uses OpenCSV’s <text:span text:style-name="Source_20_Text">CSVReaderHeaderAware</text:span> for header-aware parsing.</text:p>
        </text:list-item>
        <text:list-item>
          <text:p text:style-name="P55">Assumes the first requested column is the key, the second is the value.</text:p>
        </text:list-item>
      </text:list>
      <text:h text:style-name="Heading_20_3" text:outline-level="3"><text:bookmark text:name="_mcp_0c4ac5c1"/><text:bookmark-start text:name="observable-properties-1"/><text:bookmark-start text:name="__RefHeading___Toc8605_3058386561"/>Observable properties<text:bookmark-end text:name="observable-properties-1"/><text:bookmark-end text:name="__RefHeading___Toc8605_3058386561"/></text:h>
      <text:list text:style-name="L25">
        <text:list-item>
          <text:p text:style-name="P56"><text:span text:style-name="Source_20_Text">num_speaker_codes_available </text:span>– Number of distinct speaker codes.</text:p>
        </text:list-item>
        <text:list-item>
          <text:p text:style-name="P56"><text:span text:style-name="Source_20_Text">utterances_available</text:span> – Total number of utterances loaded.</text:p>
        </text:list-item>
      </text:list>
      <text:h text:style-name="Heading_20_3" text:outline-level="3"><text:bookmark text:name="_mcp_dc502326"/><text:bookmark-start text:name="operations-1"/><text:bookmark-start text:name="__RefHeading___Toc8607_3058386561"/>Operations<text:bookmark-end text:name="operations-1"/><text:bookmark-end text:name="__RefHeading___Toc8607_3058386561"/></text:h>
      <text:p text:style-name="Text_20_body"><text:span text:style-name="Source_20_Text">getRandomUtterance()</text:span> – Returns a random speaker code, a random utterance from that speaker (as a word array), and the utterance length.</text:p>
      <text:p text:style-name="Text_20_body"><text:span text:style-name="Source_20_Text">getBulkUtterances(double numWordsRequired)</text:span> – Accumulates random utterances until the total word count meets or exceeds <text:span text:style-name="Source_20_Text">numWordsRequired</text:span>. Returns the collected utterances as an <text:span text:style-name="Source_20_Text">Object[]</text:span> of <text:span text:style-name="Source_20_Text">String[]</text:span> arrays and the actual word count provided.</text:p>
      <text:h text:style-name="Heading_20_2" text:outline-level="2"><text:bookmark text:name="_mcp_1609ef3c"/><text:bookmark-start text:name="synchroniserjava"/><text:bookmark-start text:name="__RefHeading___Toc8609_3058386561"/>Synchroniser.java<text:bookmark-end text:name="synchroniserjava"/><text:bookmark-end text:name="__RefHeading___Toc8609_3058386561"/></text:h>
      <text:p text:style-name="Text_20_body"><text:span text:style-name="T1">Location:</text:span> <text:span text:style-name="Source_20_Text">src/env/Synchroniser.java</text:span><text:span text:style-name="Source_5f_Text"><text:span text:style-name="T2"><text:line-break/></text:span></text:span><text:span text:style-name="T1">Workspace:</text:span> <text:span text:style-name="Source_20_Text">sync</text:span></text:p>
      <text:p text:style-name="Text_20_body">The central coordination artefact that controls the simulation lifecycle through a state machine.</text:p>
      <text:h text:style-name="P57" text:outline-level="3"><text:bookmark text:name="_mcp_080c0ea3"/><text:bookmark-start text:name="state-machine"/><text:bookmark-start text:name="__RefHeading___Toc8611_3058386561"/><text:soft-page-break/>State machine<text:bookmark-end text:name="state-machine"/><text:bookmark-end text:name="__RefHeading___Toc8611_3058386561"/></text:h>
      <text:p text:style-name="P58"><text:span text:style-name="Source_20_Text"><draw:frame draw:style-name="fr1" draw:name="Image2" text:anchor-type="as-char" svg:width="19.001cm" svg:height="6.925cm" draw:z-index="1"><draw:image xlink:href="Pictures/100000010000030300000119145411AC.png" xlink:type="simple" xlink:show="embed" xlink:actuate="onLoad" draw:mime-type="image/png"/></draw:frame></text:span></text:p>
      <text:h text:style-name="Heading_20_3" text:outline-level="3"><text:bookmark text:name="_mcp_e6df69e5"/><text:bookmark-start text:name="static-state"/><text:bookmark-start text:name="__RefHeading___Toc8613_3058386561"/>Static state<text:bookmark-end text:name="static-state"/><text:bookmark-end text:name="__RefHeading___Toc8613_3058386561"/></text:h>
      <text:list text:style-name="L26">
        <text:list-item>
          <text:p text:style-name="P59"><text:span text:style-name="Source_20_Text">numFamily</text:span>, <text:span text:style-name="Source_20_Text">numParents</text:span> – Set during initialisation.</text:p>
        </text:list-item>
        <text:list-item>
          <text:p text:style-name="P59"><text:span text:style-name="Source_20_Text">homeGroups</text:span>, <text:span text:style-name="Source_20_Text">numGroupsCreated</text:span> – Track home group creation during startup.</text:p>
        </text:list-item>
        <text:list-item>
          <text:p text:style-name="P59"><text:span text:style-name="Source_20_Text">completedYearCount</text:span>, <text:span text:style-name="Source_20_Text">cyclesCompleted</text:span> – Track simulation progress.</text:p>
        </text:list-item>
        <text:list-item>
          <text:p text:style-name="P59"><text:span text:style-name="Source_20_Text">parentsFinished</text:span> – Counter for daily home-phase completion.</text:p>
        </text:list-item>
        <text:list-item>
          <text:p text:style-name="P59"><text:span text:style-name="Source_20_Text">childrenFinalised</text:span> – Counter for end-of-simulation finalisation.</text:p>
        </text:list-item>
        <text:list-item>
          <text:p text:style-name="P59"><text:span text:style-name="Source_20_Text">CYCLES_PER_YEAR = </text:span><text:span text:style-name="Source_20_Text"><text:span text:style-name="T7">36</text:span></text:span><text:span text:style-name="Source_20_Text">5</text:span> – Days per simulated year.</text:p>
        </text:list-item>
        <text:list-item>
          <text:p text:style-name="P59"><text:span text:style-name="Source_20_Text">ReentrantLock lock</text:span> – Prevents duplicate end-of-day/end-of-simulation processing.</text:p>
        </text:list-item>
      </text:list>
      <text:h text:style-name="Heading_20_3" text:outline-level="3"><text:bookmark text:name="_mcp_a4c4f715"/><text:bookmark-start text:name="observable-properties-2"/><text:bookmark-start text:name="__RefHeading___Toc8615_3058386561"/>Observable properties<text:bookmark-end text:name="observable-properties-2"/><text:bookmark-end text:name="__RefHeading___Toc8615_3058386561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Property</text:p>
            </table:table-cell>
            <table:table-cell table:style-name="Table6.A1" office:value-type="string">
              <text:p text:style-name="Table_20_Heading">Type</text:p>
            </table:table-cell>
            <table:table-cell table:style-name="Table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2" office:value-type="string">
            <text:p text:style-name="Table_20_Contents"><text:span text:style-name="Source_20_Text">status</text:span></text:p>
          </table:table-cell>
          <table:table-cell table:style-name="Table6.A2" office:value-type="string">
            <text:p text:style-name="Table_20_Contents"><text:span text:style-name="Source_20_Text">String</text:span></text:p>
          </table:table-cell>
          <table:table-cell table:style-name="Table6.C2" office:value-type="string">
            <text:p text:style-name="Table_20_Contents">Current lifecycle state</text:p>
          </table:table-cell>
        </table:table-row>
        <table:table-row>
          <table:table-cell table:style-name="Table6.A2" office:value-type="string">
            <text:p text:style-name="Table_20_Contents"><text:span text:style-name="Source_20_Text">year</text:span></text:p>
          </table:table-cell>
          <table:table-cell table:style-name="Table6.A2" office:value-type="string">
            <text:p text:style-name="Table_20_Contents"><text:span text:style-name="Source_20_Text">int</text:span></text:p>
          </table:table-cell>
          <table:table-cell table:style-name="Table6.C2" office:value-type="string">
            <text:p text:style-name="Table_20_Contents">Current year number (1-based)</text:p>
          </table:table-cell>
        </table:table-row>
        <table:table-row>
          <table:table-cell table:style-name="Table6.A2" office:value-type="string">
            <text:p text:style-name="Table_20_Contents"><text:span text:style-name="Source_20_Text">day</text:span></text:p>
          </table:table-cell>
          <table:table-cell table:style-name="Table6.A2" office:value-type="string">
            <text:p text:style-name="Table_20_Contents"><text:span text:style-name="Source_20_Text">int</text:span></text:p>
          </table:table-cell>
          <table:table-cell table:style-name="Table6.C2" office:value-type="string">
            <text:p text:style-name="Table_20_Contents">Current day number (1-based)</text:p>
          </table:table-cell>
        </table:table-row>
        <table:table-row>
          <table:table-cell table:style-name="Table6.A2" office:value-type="string">
            <text:p text:style-name="Table_20_Contents"><text:span text:style-name="Source_20_Text">agent_age</text:span></text:p>
          </table:table-cell>
          <table:table-cell table:style-name="Table6.A2" office:value-type="string">
            <text:p text:style-name="Table_20_Contents"><text:span text:style-name="Source_20_Text">int</text:span></text:p>
          </table:table-cell>
          <table:table-cell table:style-name="Table6.C2" office:value-type="string">
            <text:p text:style-name="Table_20_Contents">Current age of child agents</text:p>
          </table:table-cell>
        </table:table-row>
        <table:table-row>
          <table:table-cell table:style-name="Table6.A2" office:value-type="string">
            <text:p text:style-name="Table_20_Contents"><text:span text:style-name="Source_20_Text">children_finished</text:span></text:p>
          </table:table-cell>
          <table:table-cell table:style-name="Table6.A2" office:value-type="string">
            <text:p text:style-name="Table_20_Contents"><text:span text:style-name="Source_20_Text">int</text:span></text:p>
          </table:table-cell>
          <table:table-cell table:style-name="Table6.C2" office:value-type="string">
            <text:p text:style-name="Table_20_Contents">Number of children that have finalised</text:p>
          </table:table-cell>
        </table:table-row>
      </table:table>
      <text:h text:style-name="Heading_20_3" text:outline-level="3"><text:bookmark text:name="_mcp_c67ee086"/><text:bookmark-start text:name="operations-2"/><text:bookmark-start text:name="__RefHeading___Toc8617_3058386561"/>Operations<text:bookmark-end text:name="operations-2"/><text:bookmark-end text:name="__RefHeading___Toc8617_3058386561"/></text:h>
      <text:p text:style-name="Text_20_body"><text:span text:style-name="Source_20_Text">groupCreated(String groupName)</text:span> – Called by parent agents after creating a home group. When all families are registered, transitions to “Ready”.</text:p>
      <text:p text:style-name="Text_20_body"><text:span text:style-name="Source_20_Text">schoolReady()</text:span> – Called by the teacher. Transitions to “StartSchool”. Guarded: only accepts calls from <text:span text:style-name="Source_20_Text">classroom_teacher</text:span>.</text:p>
      <text:p text:style-name="Text_20_body"><text:span text:style-name="Source_20_Text">startSchool()</text:span> – Called by the teacher. Transitions to “SchoolStarted”. Guarded: teacher only.</text:p>
      <text:p text:style-name="Text_20_body"><text:span text:style-name="Source_20_Text">finishSchool()</text:span> – Called by the teacher. Transitions through “SchoolFinished” to “StartHome”. Guarded: teacher only.</text:p>
      <text:p text:style-name="Text_20_body"><text:span text:style-name="Source_20_Text">finishedHome()</text:span> – Called by each parent agent. Increments <text:span text:style-name="Source_20_Text">parentsFinished</text:span>. When the count reaches <text:span text:style-name="Source_20_Text">numParents</text:span>, <text:span text:style-name="Source_20_Text">tryLock()</text:span> ensures exactly one thread resets the counter and calls <text:span text:style-name="Source_20_Text">endOfDay()</text:span>; concurrent threads that also see the condition met fail to acquire the lock and return without action.</text:p>
      <text:p text:style-name="Text_20_body"><text:span text:style-name="Source_20_Text">childAgentFinalised()</text:span> – Called by each child at simulation end. Increments <text:span text:style-name="Source_20_Text">childrenFinalised</text:span> and updates the <text:span text:style-name="Source_20_Text">children_finished</text:span> observable property, then blocks (via <text:span text:style-name="Source_20_Text">await("allChildrenFinished")</text:span>) until all children have reported. Once released, <text:span text:style-name="Source_20_Text">tryLock()</text:span> ensures only one thread writes output files via <text:span text:style-name="Source_20_Text">DataLogger.writeFiles()</text:span>, shuts down the MAS via <text:span text:style-name="Source_20_Text">RuntimeServicesFactory.get().stopMAS()</text:span>, and prints the output file locations.</text:p>
      <text:h text:style-name="Heading_20_3" text:outline-level="3"><text:bookmark text:name="_mcp_e2650108"/><text:bookmark-start text:name="private-methods"/><text:bookmark-start text:name="__RefHeading___Toc8619_3058386561"/><text:soft-page-break/>Private methods<text:bookmark-end text:name="private-methods"/><text:bookmark-end text:name="__RefHeading___Toc8619_3058386561"/></text:h>
      <text:p text:style-name="Text_20_body"><text:span text:style-name="Source_20_Text">endOfDay()</text:span> – Increments the day counter. If more days remain in the year, transitions to “StartSchool”. If the year is complete, signals <text:span text:style-name="Source_20_Text">newYear</text:span>, increments the age, and either starts a new year or signals <text:span text:style-name="Source_20_Text">finalise</text:span>.</text:p>
      <text:p text:style-name="Text_20_body"><text:span text:style-name="Source_20_Text">isTeacher(String agentName)</text:span> – Guard helper that checks if the calling agent is <text:span text:style-name="Source_20_Text">classroom_teacher</text:span>.</text:p>
      <text:h text:style-name="Heading_20_2" text:outline-level="2"><text:bookmark text:name="_mcp_2395b0b8"/><text:bookmark-start text:name="dataloggerjava"/><text:bookmark-start text:name="__RefHeading___Toc8621_3058386561"/>DataLogger.java<text:bookmark-end text:name="dataloggerjava"/><text:bookmark-end text:name="__RefHeading___Toc8621_3058386561"/></text:h>
      <text:p text:style-name="Text_20_body"><text:span text:style-name="T1">Location:</text:span> <text:span text:style-name="Source_20_Text">src/env/DataLogger.java</text:span><text:span text:style-name="Source_5f_Text"><text:span text:style-name="T2"><text:line-break/></text:span></text:span><text:span text:style-name="T1">Workspace:</text:span> <text:span text:style-name="Source_20_Text">sync</text:span></text:p>
      <text:p text:style-name="Text_20_body">Records simulation statistics and writes output CSV files.</text:p>
      <text:h text:style-name="Heading_20_3" text:outline-level="3"><text:bookmark text:name="_mcp_2073856f"/><text:bookmark-start text:name="static-state-1"/><text:bookmark-start text:name="__RefHeading___Toc8623_3058386561"/>Static state<text:bookmark-end text:name="static-state-1"/><text:bookmark-end text:name="__RefHeading___Toc8623_3058386561"/></text:h>
      <text:list text:style-name="L27">
        <text:list-item>
          <text:p text:style-name="P60"><text:span text:style-name="Source_20_Text">timeStampString</text:span> – Formatted start time used in output filenames (<text:span text:style-name="Source_20_Text">YY-mm-dd-HH-MM-SS</text:span>).</text:p>
        </text:list-item>
        <text:list-item>
          <text:p text:style-name="P60"><text:span text:style-name="Source_20_Text">ArrayList&lt;WordCountRow&gt; wordCountRows</text:span> – Accumulated annual statistics.</text:p>
        </text:list-item>
      </text:list>
      <text:h text:style-name="Heading_20_3" text:outline-level="3"><text:bookmark text:name="_mcp_22085ed3"/><text:bookmark-start text:name="operations-3"/><text:bookmark-start text:name="__RefHeading___Toc8625_3058386561"/>Operations<text:bookmark-end text:name="operations-3"/><text:bookmark-end text:name="__RefHeading___Toc8625_3058386561"/></text:h>
      <text:p text:style-name="Text_20_body"><text:span text:style-name="Source_20_Text">addAnnualStats(String agentName, String ses, int age, int uniqueSeen, int uniqueHeard, int learned)</text:span> – Called by child agents at each year-end. Appends a <text:span text:style-name="Source_20_Text">WordCountRow</text:span> to the list.</text:p>
      <text:h text:style-name="Heading_20_3" text:outline-level="3"><text:bookmark text:name="_mcp_cc89bf6b"/><text:bookmark-start text:name="static-methods"/><text:bookmark-start text:name="__RefHeading___Toc8627_3058386561"/>Static methods<text:bookmark-end text:name="static-methods"/><text:bookmark-end text:name="__RefHeading___Toc8627_3058386561"/></text:h>
      <text:p text:style-name="Text_20_body"><text:span text:style-name="Source_20_Text">initialise()</text:span> – Captures the start timestamp.</text:p>
      <text:p text:style-name="Text_20_body"><text:span text:style-name="Source_20_Text">writeFiles()</text:span> – Called by the Synchroniser at simulation end. Writes two CSV files:</text:p>
      <text:list text:style-name="L28">
        <text:list-item>
          <text:p text:style-name="P61"><text:span text:style-name="T1">Summary file</text:span> (<text:span text:style-name="Source_20_Text">YY-mm-dd-HH-MM-SS summary.csv</text:span>): Columns: Name, SES, Age, Unique_Seen, Unique_Heard, Words_Learned.</text:p>
        </text:list-item>
        <text:list-item>
          <text:p text:style-name="P62"><text:span text:style-name="T1">Word list file</text:span> (<text:span text:style-name="Source_20_Text">YY-mm-dd-HH-MM-SS word_list.csv</text:span>): Columns: Word, Name, SES, Age.</text:p>
        </text:list-item>
      </text:list>
      <text:p text:style-name="Text_20_body"><text:span text:style-name="Source_20_Text">outputSummaryLocation()</text:span><text:span text:style-name="T1"> / </text:span><text:span text:style-name="Source_20_Text">outputWordsLocation()</text:span> – Return the output file paths.</text:p>
      <text:h text:style-name="Heading_20_2" text:outline-level="2"><text:bookmark text:name="_mcp_68416d4a"/><text:bookmark-start text:name="wordslearntjava"/><text:bookmark-start text:name="__RefHeading___Toc8629_3058386561"/>WordsLearnt.java<text:bookmark-end text:name="wordslearntjava"/><text:bookmark-end text:name="__RefHeading___Toc8629_3058386561"/></text:h>
      <text:p text:style-name="Text_20_body"><text:span text:style-name="T1">Location:</text:span> <text:span text:style-name="Source_20_Text">src/env/WordsLearnt.java</text:span><text:span text:style-name="Source_5f_Text"><text:span text:style-name="T2"><text:line-break/></text:span></text:span><text:span text:style-name="T1">Workspace:</text:span> <text:span text:style-name="Source_20_Text">sync</text:span></text:p>
      <text:p text:style-name="Text_20_body">Tracks which words each agent learned, used for the word list CSV output.</text:p>
      <text:h text:style-name="Heading_20_3" text:outline-level="3"><text:bookmark text:name="_mcp_3717753c"/><text:bookmark-start text:name="data-structure"/><text:bookmark-start text:name="__RefHeading___Toc8631_3058386561"/>Data structure<text:bookmark-end text:name="data-structure"/><text:bookmark-end text:name="__RefHeading___Toc8631_3058386561"/></text:h>
      <text:p text:style-name="Text_20_body"><text:span text:style-name="Source_20_Text">HashMap&lt;String, ArrayList&lt;AgentDetails&gt;&gt; wordAoA</text:span> – Maps words to lists of <text:span text:style-name="Source_5f_Text"><text:span text:style-name="T2">AgentDetails</text:span></text:span> records (name, SES, age, word). Uses a private <text:span text:style-name="Source_20_Text">record AgentDetails</text:span>.</text:p>
      <text:h text:style-name="Heading_20_3" text:outline-level="3"><text:bookmark text:name="_mcp_62662f96"/><text:bookmark-start text:name="operations-4"/><text:bookmark-start text:name="__RefHeading___Toc8633_3058386561"/>Operations<text:bookmark-end text:name="operations-4"/><text:bookmark-end text:name="__RefHeading___Toc8633_3058386561"/></text:h>
      <text:p text:style-name="Text_20_body"><text:span text:style-name="Source_20_Text">addLearnedWords(String agentName, String ses, Object[] wordAoa)</text:span> – Called by child agents during finalisation. Parses the AgentSpeak term array (format: <text:span text:style-name="Source_20_Text">aoa(Word, Age)</text:span>), extracting word and age via string splitting on <text:span text:style-name="Source_20_Text">[(),"]</text:span>. Deduplicates by checking if the agent already has an entry for each word.</text:p>
      <text:h text:style-name="Heading_20_3" text:outline-level="3"><text:bookmark text:name="_mcp_706bf8c4"/><text:bookmark-start text:name="static-methods-1"/><text:bookmark-start text:name="__RefHeading___Toc8635_3058386561"/>Static methods<text:bookmark-end text:name="static-methods-1"/><text:bookmark-end text:name="__RefHeading___Toc8635_3058386561"/></text:h>
      <text:p text:style-name="Text_20_body"><text:span text:style-name="Source_20_Text">getAll()</text:span> – Returns all entries as <text:span text:style-name="Source_20_Text">ArrayList&lt;WordLearntRow&gt;</text:span>, used by <text:span text:style-name="Source_20_Text">DataLogger.writeFiles()</text:span>.</text:p>
      <text:h text:style-name="Heading_20_1" text:outline-level="1"><text:bookmark text:name="_mcp_adb46ff7"/><text:bookmark-start text:name="organisational-layer"/><text:bookmark-start text:name="__RefHeading___Toc8637_3058386561"/><text:soft-page-break/>Organisational Layer (Moise)<text:bookmark-end text:name="organisational-layer"/><text:bookmark-end text:name="__RefHeading___Toc8637_3058386561"/></text:h>
      <text:h text:style-name="Heading_20_2" text:outline-level="2"><text:bookmark text:name="_mcp_83de8724"/><text:bookmark-start text:name="learning_environxml"/><text:bookmark-start text:name="__RefHeading___Toc8639_3058386561"/>learning_environ.xml<text:bookmark-end text:name="learning_environxml"/><text:bookmark-end text:name="__RefHeading___Toc8639_3058386561"/></text:h>
      <text:p text:style-name="Text_20_body"><text:span text:style-name="T1">Location:</text:span> <text:span text:style-name="Source_20_Text">src/org/learning_environ.xml</text:span></text:p>
      <text:p text:style-name="Text_20_body">Defines the organisational specification using Moise’s XML schema.</text:p>
      <text:h text:style-name="Heading_20_3" text:outline-level="3"><text:bookmark text:name="_mcp_2d31dbc1"/><text:bookmark-start text:name="structural-specification"/><text:bookmark-start text:name="__RefHeading___Toc8641_3058386561"/>Structural specification<text:bookmark-end text:name="structural-specification"/><text:bookmark-end text:name="__RefHeading___Toc8641_3058386561"/></text:h>
      <text:p text:style-name="Text_20_body"><text:span text:style-name="T1">Roles:</text:span> <text:span text:style-name="Source_20_Text">adult</text:span>, <text:span text:style-name="Source_20_Text">child</text:span>, <text:span text:style-name="Source_20_Text">offspring</text:span>, <text:span text:style-name="Source_20_Text">parent</text:span>, <text:span text:style-name="Source_20_Text">student</text:span>, <text:span text:style-name="Source_20_Text">teacher</text:span></text:p>
      <text:p text:style-name="P63">Group hierarchy:</text:p>
      <text:p text:style-name="P64"><text:span text:style-name="Source_20_Text">learning_environment (root)</text:span></text:p>
      <text:p text:style-name="P65"><text:span text:style-name="Source_20_Text">+-- classroom</text:span></text:p>
      <text:p text:style-name="P65"><text:span text:style-name="Source_20_Text">| <text:s text:c="2"/>+-- teacher (min: 1, max: 1)</text:span></text:p>
      <text:p text:style-name="P65"><text:span text:style-name="Source_20_Text">| <text:s text:c="2"/>+-- student (min: 1, max: unbounded)</text:span></text:p>
      <text:p text:style-name="P65"><text:span text:style-name="Source_20_Text">+-- village</text:span></text:p>
      <text:p text:style-name="P65"><text:span text:style-name="Source_20_Text"><text:s text:c="4"/>+-- adult (min: 1)</text:span></text:p>
      <text:p text:style-name="P65"><text:span text:style-name="Source_20_Text"><text:s text:c="4"/>+-- child (min: 1)</text:span></text:p>
      <text:p text:style-name="P65"><text:span text:style-name="Source_20_Text"><text:s text:c="4"/>+-- indv_home (sub-group, min: 1)</text:span></text:p>
      <text:p text:style-name="P65"><text:span text:style-name="Source_20_Text"><text:s text:c="8"/>+-- parent (min: 1, max: 2)</text:span></text:p>
      <text:p text:style-name="P65"><text:span text:style-name="Source_20_Text"><text:s text:c="8"/>+-- offspring (min: 1, max: 1)</text:span></text:p>
      <text:p text:style-name="P66">Links:</text:p>
      <text:list text:style-name="L29">
        <text:list-item>
          <text:p text:style-name="P67">Teacher has <text:span text:style-name="Source_20_Text">authority</text:span> and bi-directional <text:span text:style-name="Source_20_Text">communication</text:span> with students (intra-group).</text:p>
        </text:list-item>
      </text:list>
      <text:p text:style-name="Text_20_body">Formation constraints:</text:p>
      <text:list text:style-name="L30">
        <text:list-item>
          <text:p text:style-name="P68"><text:span text:style-name="Source_20_Text">offspring</text:span> and <text:span text:style-name="Source_20_Text">student</text:span> roles are compatible (bi-directional), allowing a single agent to hold both roles simultaneously.</text:p>
        </text:list-item>
      </text:list>
      <text:h text:style-name="Heading_20_3" text:outline-level="3"><text:bookmark text:name="_mcp_76bd800f"/><text:bookmark-start text:name="functional-specification"/><text:bookmark-start text:name="__RefHeading___Toc8643_3058386561"/>Functional specification<text:bookmark-end text:name="functional-specification"/><text:bookmark-end text:name="__RefHeading___Toc8643_3058386561"/></text:h>
      <text:p text:style-name="Text_20_body"><text:span text:style-name="T1">Scheme </text:span><text:span text:style-name="Source_20_Text">classroom_reading_books</text:span><text:span text:style-name="T1">:</text:span></text:p>
      <text:list xml:id="list1877901362" text:style-name="L31">
        <text:list-item>
          <text:p text:style-name="P69">Root goal: <text:span text:style-name="Source_20_Text">tell_class_to_read_a_book</text:span> (sequential plan)</text:p>
          <text:list text:style-name="L32">
            <text:list-item>
              <text:p text:style-name="P70">Sub-goal 1: <text:span text:style-name="Source_20_Text">find_my_students</text:span></text:p>
            </text:list-item>
            <text:list-item>
              <text:p text:style-name="P70">Sub-goal 2: <text:span text:style-name="Source_20_Text">read_books</text:span></text:p>
            </text:list-item>
          </text:list>
        </text:list-item>
        <text:list-item>
          <text:p text:style-name="P69">Mission <text:span text:style-name="Source_20_Text">tellStudentsToRead</text:span>: encompasses both sub-goals.</text:p>
        </text:list-item>
      </text:list>
      <text:p text:style-name="Text_20_body"><text:span text:style-name="T1">Scheme </text:span><text:span text:style-name="Source_20_Text">speak_to_child</text:span><text:span text:style-name="T1">:</text:span></text:p>
      <text:list xml:id="list4192881736" text:style-name="L33">
        <text:list-item>
          <text:p text:style-name="P71">Root goal: <text:span text:style-name="Source_20_Text">speak_an_utterance_to_child</text:span> (sequential plan)</text:p>
          <text:list text:style-name="L34">
            <text:list-item>
              <text:p text:style-name="P72">Sub-goal: <text:span text:style-name="Source_20_Text">speak_utterance</text:span></text:p>
            </text:list-item>
          </text:list>
        </text:list-item>
        <text:list-item>
          <text:p text:style-name="P71">Mission <text:span text:style-name="Source_20_Text">speakUtterances</text:span>: encompasses the sub-goal.</text:p>
        </text:list-item>
      </text:list>
      <text:h text:style-name="Heading_20_3" text:outline-level="3"><text:bookmark text:name="_mcp_3b47f4e0"/><text:bookmark-start text:name="normative-specification"/><text:bookmark-start text:name="__RefHeading___Toc8645_3058386561"/>Normative specification<text:bookmark-end text:name="normative-specification"/><text:bookmark-end text:name="__RefHeading___Toc8645_3058386561"/></text:h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header-rows>
          <table:table-row>
            <table:table-cell table:style-name="Table7.A1" office:value-type="string">
              <text:p text:style-name="Table_20_Heading">Norm</text:p>
            </table:table-cell>
            <table:table-cell table:style-name="Table7.A1" office:value-type="string">
              <text:p text:style-name="Table_20_Heading">Type</text:p>
            </table:table-cell>
            <table:table-cell table:style-name="Table7.A1" office:value-type="string">
              <text:p text:style-name="Table_20_Heading">Role</text:p>
            </table:table-cell>
            <table:table-cell table:style-name="Table7.D1" office:value-type="string">
              <text:p text:style-name="Table_20_Heading">Mission</text:p>
            </table:table-cell>
          </table:table-row>
        </table:table-header-rows>
        <table:table-row>
          <table:table-cell table:style-name="Table7.A2" office:value-type="string">
            <text:p text:style-name="Table_20_Contents"><text:span text:style-name="Source_20_Text">parentNorm</text:span></text:p>
          </table:table-cell>
          <table:table-cell table:style-name="Table7.A2" office:value-type="string">
            <text:p text:style-name="Table_20_Contents">obligation</text:p>
          </table:table-cell>
          <table:table-cell table:style-name="Table7.A2" office:value-type="string">
            <text:p text:style-name="Table_20_Contents">parent</text:p>
          </table:table-cell>
          <table:table-cell table:style-name="Table7.D2" office:value-type="string">
            <text:p text:style-name="Table_20_Contents">speakUtterances</text:p>
          </table:table-cell>
        </table:table-row>
        <table:table-row>
          <table:table-cell table:style-name="Table7.A2" office:value-type="string">
            <text:p text:style-name="Table_20_Contents"><text:span text:style-name="Source_20_Text">teacherNorm</text:span></text:p>
          </table:table-cell>
          <table:table-cell table:style-name="Table7.A2" office:value-type="string">
            <text:p text:style-name="Table_20_Contents">obligation</text:p>
          </table:table-cell>
          <table:table-cell table:style-name="Table7.A2" office:value-type="string">
            <text:p text:style-name="Table_20_Contents">teacher</text:p>
          </table:table-cell>
          <table:table-cell table:style-name="Table7.D2" office:value-type="string">
            <text:p text:style-name="Table_20_Contents">tellStudentsToRead</text:p>
          </table:table-cell>
        </table:table-row>
      </table:table>
      <text:h text:style-name="Heading_20_1" text:outline-level="1"><text:bookmark text:name="_mcp_a3ed367b"/><text:bookmark-start text:name="jacamo-project-file"/><text:bookmark-start text:name="__RefHeading___Toc8647_3058386561"/>JaCaMo Project File<text:bookmark-end text:name="jacamo-project-file"/><text:bookmark-end text:name="__RefHeading___Toc8647_3058386561"/></text:h>
      <text:p text:style-name="Text_20_body"><text:span text:style-name="T1">File:</text:span> <text:span text:style-name="Source_20_Text">child_vocabulary_acquisition.jcm</text:span></text:p>
      <text:p text:style-name="Text_20_body">Defines the static MAS configuration:</text:p>
      <text:p text:style-name="P63">Statically-defined agent:</text:p>
      <text:list text:style-name="L35">
        <text:list-item>
          <text:p text:style-name="P73"><text:soft-page-break/><text:span text:style-name="Source_20_Text">classroom_teacher</text:span> – Source: <text:span text:style-name="Source_20_Text">teacher.asl</text:span>, focuses on <text:span text:style-name="Source_20_Text">classroom.library</text:span> and <text:span text:style-name="Source_20_Text">sync.synchroniser</text:span>, plays <text:span text:style-name="Source_20_Text">teacher</text:span> role in <text:span text:style-name="Source_20_Text">class</text:span> group.</text:p>
        </text:list-item>
      </text:list>
      <text:p text:style-name="P63">Workspaces and artefacts:</text:p>
      <text:list text:style-name="L36">
        <text:list-item>
          <text:p text:style-name="P74"><text:span text:style-name="Source_20_Text">sync</text:span>: <text:span text:style-name="Source_20_Text">Synchroniser</text:span>, <text:span text:style-name="Source_20_Text">DataLogger</text:span>, <text:span text:style-name="Source_20_Text">WordsLearnt</text:span></text:p>
        </text:list-item>
        <text:list-item>
          <text:p text:style-name="P74"><text:span text:style-name="Source_20_Text">classroom</text:span>: <text:span text:style-name="Source_20_Text">Library</text:span></text:p>
        </text:list-item>
        <text:list-item>
          <text:p text:style-name="P74"><text:span text:style-name="Source_20_Text">home_environ</text:span>: <text:span text:style-name="Source_20_Text">Utterances</text:span></text:p>
        </text:list-item>
      </text:list>
      <text:p text:style-name="P75">Organisation:</text:p>
      <text:list text:style-name="L37">
        <text:list-item>
          <text:p text:style-name="P76"><text:span text:style-name="Source_20_Text">learning_environ</text:span> with group <text:span text:style-name="Source_20_Text">class</text:span> (type: <text:span text:style-name="Source_20_Text">classroom</text:span>) responsible for scheme <text:span text:style-name="Source_20_Text">readingBooksClassroom</text:span> (type: <text:span text:style-name="Source_20_Text">classroom_reading_books</text:span>), and group <text:span text:style-name="Source_20_Text">village</text:span>.</text:p>
        </text:list-item>
      </text:list>
      <text:p text:style-name="P63">Platform configuration:</text:p>
      <text:p text:style-name="Preformatted_20_Text"><text:span text:style-name="Source_20_Text">platform: local(asych_shared, 64, </text:span><text:span text:style-name="Source_20_Text"><text:span text:style-name="T8">5, 5, 10</text:span></text:span><text:span text:style-name="Source_20_Text">)</text:span></text:p>
      <text:p text:style-name="P66">This configures Jason’s threading model:</text:p>
      <text:list text:style-name="L38">
        <text:list-item>
          <text:p text:style-name="P77"><text:span text:style-name="Source_20_Text">asych_shared</text:span> – Asynchronous shared thread pool</text:p>
        </text:list-item>
        <text:list-item>
          <text:p text:style-name="P77"><text:span text:style-name="Source_20_Text">64</text:span> – Number of threads in the pool</text:p>
        </text:list-item>
        <text:list-item>
          <text:p text:style-name="P78"><text:span text:style-name="Source_20_Text"><text:span text:style-name="T8">5, 5, 10</text:span></text:span> – Reasoning cycle parameters (sense, deliberate, act repetitions per scheduling slot)</text:p>
        </text:list-item>
      </text:list>
      <text:p text:style-name="Text_20_body">The large thread pool prevents deadlocks during startup with many agents, even when the host CPU has fewer cores.</text:p>
      <text:h text:style-name="P16" text:outline-level="1"><text:bookmark text:name="_mcp_c54437a1"/><text:bookmark-start text:name="simulation-lifecycle"/><text:bookmark-start text:name="__RefHeading___Toc8649_3058386561"/>Simulation Lifecycle<text:bookmark-end text:name="simulation-lifecycle"/><text:bookmark-end text:name="__RefHeading___Toc8649_3058386561"/></text:h>
      <text:h text:style-name="Heading_20_2" text:outline-level="2"><text:bookmark text:name="_mcp_14e31720"/><text:bookmark-start text:name="startup-sequence"/><text:bookmark-start text:name="__RefHeading___Toc8651_3058386561"/>Startup Sequence<text:bookmark-end text:name="startup-sequence"/><text:bookmark-end text:name="__RefHeading___Toc8651_3058386561"/></text:h>
      <text:list text:style-name="L39">
        <text:list-item>
          <text:p text:style-name="P79"><text:span text:style-name="Source_20_Text">VocabLauncher.main()</text:span> initialises JaCaMo runtime services.</text:p>
        </text:list-item>
        <text:list-item>
          <text:p text:style-name="P79"><text:span text:style-name="Source_20_Text">create()</text:span> sets up platforms, environments, organisations, and agents.</text:p>
        </text:list-item>
        <text:list-item>
          <text:p text:style-name="P79"><text:span text:style-name="Source_20_Text">createAgs()</text:span> loads configuration, initialises artefacts, and creates dynamic agents.</text:p>
        </text:list-item>
        <text:list-item>
          <text:p text:style-name="P79"><text:span text:style-name="Source_20_Text">start()</text:span> launches all agents.</text:p>
        </text:list-item>
        <text:list-item>
          <text:p text:style-name="P79">Parent agents create home groups and signal <text:span text:style-name="Source_20_Text">groupCreated</text:span>.</text:p>
        </text:list-item>
        <text:list-item>
          <text:p text:style-name="P79">Once all groups are created, the synchroniser transitions to “Ready”.</text:p>
        </text:list-item>
        <text:list-item>
          <text:p text:style-name="P79">Teacher executes <text:span text:style-name="Source_20_Text">find_my_students</text:span> and signals <text:span text:style-name="Source_20_Text">schoolReady</text:span>.</text:p>
        </text:list-item>
        <text:list-item>
          <text:p text:style-name="P79">Synchroniser transitions to “StartSchool”, beginning the first day.</text:p>
        </text:list-item>
      </text:list>
      <text:h text:style-name="Heading_20_2" text:outline-level="2"><text:bookmark text:name="_mcp_6d7c5f1a"/><text:bookmark-start text:name="daily-cycle"/><text:bookmark-start text:name="__RefHeading___Toc8653_3058386561"/>Daily Cycle<text:bookmark-end text:name="daily-cycle"/><text:bookmark-end text:name="__RefHeading___Toc8653_3058386561"/></text:h>
      <text:list text:style-name="L40">
        <text:list-item>
          <text:p text:style-name="P80"><text:span text:style-name="T1">Synchroniser</text:span> status: <text:span text:style-name="Source_20_Text">StartSchool</text:span></text:p>
        </text:list-item>
        <text:list-item>
          <text:p text:style-name="P80"><text:span text:style-name="T1">Teacher</text:span> signals <text:span text:style-name="Source_20_Text">startSchool</text:span> (status becomes <text:span text:style-name="Source_20_Text">SchoolStarted</text:span>), selects a book, and either reads aloud or instructs students.</text:p>
        </text:list-item>
        <text:list-item>
          <text:p text:style-name="P80"><text:span text:style-name="T1">Children</text:span> process words (seen or heard), attempt to learn each one.</text:p>
        </text:list-item>
        <text:list-item>
          <text:p text:style-name="P80"><text:span text:style-name="T1">Teacher</text:span> receives completion confirmations, signals <text:span text:style-name="Source_20_Text">finishSchool</text:span>.</text:p>
        </text:list-item>
        <text:list-item>
          <text:p text:style-name="P80"><text:span text:style-name="T1">Synchroniser</text:span> transitions through <text:span text:style-name="Source_20_Text">SchoolFinished</text:span> to <text:span text:style-name="Source_20_Text">StartHome</text:span>.</text:p>
        </text:list-item>
        <text:list-item>
          <text:p text:style-name="P80"><text:span text:style-name="T1">Parents</text:span> select and deliver utterances to their children (20 batches each).</text:p>
        </text:list-item>
        <text:list-item>
          <text:p text:style-name="P80"><text:span text:style-name="T1">Children</text:span> process utterances, confirm completion.</text:p>
        </text:list-item>
        <text:list-item>
          <text:p text:style-name="P80"><text:span text:style-name="T1">Parents</text:span> signal <text:span text:style-name="Source_20_Text">finishedHome</text:span>.</text:p>
        </text:list-item>
        <text:list-item>
          <text:p text:style-name="P81"><text:span text:style-name="T1">Synchroniser</text:span> (once all parents have reported, via counter and <text:span text:style-name="Source_20_Text">tryLock()</text:span>) calls <text:span text:style-name="Source_20_Text">endOfDay()</text:span><text:span text:style-name="T9">.</text:span></text:p>
        </text:list-item>
      </text:list>
      <text:h text:style-name="Heading_20_2" text:outline-level="2"><text:bookmark text:name="_mcp_d092c4ee"/><text:bookmark-start text:name="yearly-progression"/><text:bookmark-start text:name="__RefHeading___Toc8655_3058386561"/>Yearly Progression<text:bookmark-end text:name="yearly-progression"/><text:bookmark-end text:name="__RefHeading___Toc8655_3058386561"/></text:h>
      <text:p text:style-name="Text_20_body">After <text:span text:style-name="T10">36</text:span>5 daily cycles:</text:p>
      <text:list text:style-name="L41">
        <text:list-item>
          <text:p text:style-name="P82">Synchroniser signals <text:span text:style-name="Source_20_Text">newYear</text:span>.</text:p>
        </text:list-item>
        <text:list-item>
          <text:p text:style-name="P82">Child agents report annual statistics to <text:span text:style-name="Source_20_Text">DataLogger</text:span>.</text:p>
        </text:list-item>
        <text:list-item>
          <text:p text:style-name="P82">Child agents update their age belief.</text:p>
        </text:list-item>
        <text:list-item>
          <text:p text:style-name="P82"><text:soft-page-break/>Synchroniser increments the year counter and resets the day counter.</text:p>
        </text:list-item>
        <text:list-item>
          <text:p text:style-name="P82">If more years remain, the cycle repeats from <text:span text:style-name="Source_20_Text">StartSchool</text:span>.</text:p>
        </text:list-item>
        <text:list-item>
          <text:p text:style-name="P82">If all years are complete, the synchroniser signals <text:span text:style-name="Source_20_Text">finalise</text:span>.</text:p>
        </text:list-item>
      </text:list>
      <text:h text:style-name="Heading_20_2" text:outline-level="2"><text:bookmark text:name="_mcp_8f46310f"/><text:bookmark-start text:name="shutdown-sequence"/><text:bookmark-start text:name="__RefHeading___Toc8657_3058386561"/>Shutdown Sequence<text:bookmark-end text:name="shutdown-sequence"/><text:bookmark-end text:name="__RefHeading___Toc8657_3058386561"/></text:h>
      <text:list xml:id="list978601751" text:style-name="L42">
        <text:list-item>
          <text:p text:style-name="P83">Child agents receive the <text:span text:style-name="Source_20_Text">finalise</text:span> signal.</text:p>
        </text:list-item>
        <text:list-item>
          <text:p text:style-name="P83">Each child reports its learned words to <text:span text:style-name="Source_20_Text">WordsLearnt</text:span> and signals <text:span text:style-name="Source_20_Text">childAgentFinalised</text:span>.</text:p>
        </text:list-item>
        <text:list-item>
          <text:p text:style-name="P83">Once all children have reported (via guard <text:span text:style-name="Source_20_Text">allChildrenFinished</text:span>):</text:p>
          <text:list text:style-name="L43">
            <text:list-item>
              <text:p text:style-name="P84"><text:span text:style-name="Source_20_Text">DataLogger.writeFiles()</text:span> writes both CSV files.</text:p>
            </text:list-item>
            <text:list-item>
              <text:p text:style-name="P84"><text:span text:style-name="Source_20_Text">RuntimeServicesFactory.get().stopMAS()</text:span> initiates JaCaMo shutdown.</text:p>
            </text:list-item>
            <text:list-item>
              <text:p text:style-name="P84">Output file locations are printed to the console.</text:p>
            </text:list-item>
          </text:list>
        </text:list-item>
      </text:list>
      <text:h text:style-name="Heading_20_1" text:outline-level="1"><text:bookmark text:name="_mcp_e458d334"/><text:bookmark-start text:name="word-learning-algorithm"/><text:bookmark-start text:name="__RefHeading___Toc8659_3058386561"/>Word Learning Algorithm<text:bookmark-end text:name="word-learning-algorithm"/><text:bookmark-end text:name="__RefHeading___Toc8659_3058386561"/></text:h>
      <text:p text:style-name="Text_20_body">Each child agent maintains per-word exposure counts. A word is considered “learnt” when any of the following conditions is met: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Condition</text:p>
            </table:table-cell>
            <table:table-cell table:style-name="Table8.B1" office:value-type="string">
              <text:p text:style-name="Table_20_Heading">Threshold</text:p>
            </table:table-cell>
          </table:table-row>
        </table:table-header-rows>
        <table:table-row>
          <table:table-cell table:style-name="Table8.A2" office:value-type="string">
            <text:p text:style-name="Table_20_Contents">Seen (read) only</text:p>
          </table:table-cell>
          <table:table-cell table:style-name="Table8.B2" office:value-type="string">
            <text:p text:style-name="Table_20_Contents">&gt; 20 times</text:p>
          </table:table-cell>
        </table:table-row>
        <table:table-row>
          <table:table-cell table:style-name="Table8.A2" office:value-type="string">
            <text:p text:style-name="Table_20_Contents">Heard (speech) only</text:p>
          </table:table-cell>
          <table:table-cell table:style-name="Table8.B2" office:value-type="string">
            <text:p text:style-name="Table_20_Contents">&gt; 20 times</text:p>
          </table:table-cell>
        </table:table-row>
        <table:table-row>
          <table:table-cell table:style-name="Table8.A2" office:value-type="string">
            <text:p text:style-name="Table_20_Contents">Both seen and heard</text:p>
          </table:table-cell>
          <table:table-cell table:style-name="Table8.B2" office:value-type="string">
            <text:p text:style-name="Table_20_Contents">&gt; 12 times each</text:p>
          </table:table-cell>
        </table:table-row>
      </table:table>
      <text:p text:style-name="Text_20_body">The learning check is performed in <text:span text:style-name="Source_20_Text">try_learn_word(Word)</text:span> in <text:span text:style-name="Source_20_Text">child.asl</text:span>:</text:p>
      <text:p text:style-name="Preformatted_20_Text">if ((Seen &gt; 12 &amp; Heard &gt; 12) | Seen &gt; 20 | Heard &gt; 20) {</text:p>
      <text:p text:style-name="Preformatted_20_Text"><text:s text:c="4"/>// Mark word as learnt at current age</text:p>
      <text:p text:style-name="Preformatted_20_Text">}</text:p>
      <text:p text:style-name="Text_20_body">Once learnt, a word’s <text:span text:style-name="Source_20_Text">AgeLearned</text:span> field is set to the child’s current age and is never re-evaluated.</text:p>
      <text:h text:style-name="Heading_20_1" text:outline-level="1"><text:bookmark text:name="_mcp_a27c8ec8"/><text:bookmark-start text:name="concurrency-and-synchronisation"/><text:bookmark-start text:name="__RefHeading___Toc8661_3058386561"/>Concurrency and Synchronisation<text:bookmark-end text:name="concurrency-and-synchronisation"/><text:bookmark-end text:name="__RefHeading___Toc8661_3058386561"/></text:h>
      <text:p text:style-name="Text_20_body">The simulation involves significant concurrency challenges due to many agents operating simultaneously. Key mechanisms:</text:p>
      <text:p text:style-name="Text_20_body"><text:span text:style-name="T1">Atomic plans</text:span> (<text:span text:style-name="Source_20_Text">@[atomic]</text:span>): Used extensively in child and teacher agents to prevent interleaving of plan execution. Critical for maintaining belief-base consistency, especially during word processing and state transitions.</text:p>
      <text:p text:style-name="P85"><text:span text:style-name="T1">CArtAgO guards (</text:span><text:span text:style-name="Source_20_Text"><text:span text:style-name="T11">@GUARD</text:span></text:span><text:span text:style-name="T1">)</text:span>: The <text:span text:style-name="Source_20_Text">Synchroniser</text:span> uses the <text:span text:style-name="Source_20_Text">allChildrenFinished</text:span> guard to block the <text:span text:style-name="Source_20_Text">childAgentFinalised</text:span> operation (via <text:span text:style-name="Source_20_Text">await</text:span>) until all children have reported. Agents calling the guarded operation are suspended by CArtAgO until the guard evaluates to <text:span text:style-name="Source_20_Text">true</text:span>.</text:p>
      <text:p text:style-name="Text_20_body"><text:span text:style-name="T1">ReentrantLock</text:span>: Used in two contexts:</text:p>
      <text:list text:style-name="L44">
        <text:list-item>
          <text:p text:style-name="P86"><text:span text:style-name="Source_20_Text">Synchroniser.finishedHome()</text:span> – Each parent increments a counter; when all parents have reported, <text:span text:style-name="Source_20_Text">tryLock()</text:span> ensures exactly one thread calls <text:span text:style-name="Source_20_Text">endOfDay()</text:span>. Other threads see the counter is met but fail to acquire the lock and skip the call.</text:p>
        </text:list-item>
        <text:list-item>
          <text:p text:style-name="P86"><text:span text:style-name="Source_20_Text">Synchroniser.childAgentFinalised()</text:span> – After the <text:span text:style-name="Source_20_Text">allChildrenFinished</text:span> guard releases all waiting agents, <text:span text:style-name="Source_20_Text">tryLock()</text:span> ensures only one thread executes the shutdown sequence (writing output files and stopping the MAS).</text:p>
        </text:list-item>
        <text:list-item>
          <text:p text:style-name="P87"><text:span text:style-name="Source_20_Text">Library</text:span> – Ensures thread-safe lazy loading of book contents.</text:p>
        </text:list-item>
      </text:list>
      <text:p text:style-name="P88">HashMapBB (custom belief base): A custom <text:span text:style-name="Source_20_Text">BeliefBase</text:span> implementation (<text:span text:style-name="Source_20_Text">src/env/HashMapBB.java</text:span>) that provides O(1) indexed lookups for registered belief patterns. Each agent has its own <text:span text:style-name="Source_20_Text">HashMapBB</text:span> instance. Indexed beliefs (e.g., <text:span text:style-name="Source_20_Text">word(key,_)</text:span>) are stored in <text:span text:style-name="Source_20_Text">HashMap&lt;String, Literal&gt;</text:span> keyed by a designated argument, while non-indexed beliefs use namespace-aware linked lists. The <text:span text:style-name="Source_20_Text">getAsDOM()</text:span> method (used by the Mind Inspector) includes retry logic for <text:span text:style-name="Source_20_Text">ConcurrentModificationException</text:span>.</text:p>
      <text:p text:style-name="P89"><text:soft-page-break/>Belief-base<text:span text:style-name="T11"> </text:span><text:span text:style-name="Source_20_Text"><text:span text:style-name="T11">.wait()</text:span></text:span><text:span text:style-name="T11"> calls: Jason’s </text:span><text:span text:style-name="Source_20_Text"><text:span text:style-name="T11">.wait(condition)</text:span></text:span><text:span text:style-name="T11"> suspends the agent’s intention until the specified belief condition becomes true. Used for inter-agent coordination (e.g., waiting for group formation, waiting for idle state).</text:span></text:p>
      <text:p text:style-name="Text_20_body"><text:span text:style-name="T1">Batched utterance delivery</text:span>: Parent agents send utterances in 20 batches rather than one large message. The child uses a counter (<text:span text:style-name="Source_20_Text">finished(Counter, Parent)</text:span>) to track received batches and only signals completion after all 20 are processed. This prevents overwhelming the agent’s messaging system.</text:p>
      <text:h text:style-name="Heading_20_1" text:outline-level="1"><text:bookmark text:name="_mcp_53ab61a6"/><text:bookmark-start text:name="data-flow"/><text:bookmark-start text:name="__RefHeading___Toc8663_3058386561"/>Data Flow<text:bookmark-end text:name="data-flow"/><text:bookmark-end text:name="__RefHeading___Toc8663_3058386561"/></text:h>
      <text:p text:style-name="P90"><draw:frame draw:style-name="fr2" draw:name="Image1" text:anchor-type="as-char" svg:width="13.3cm" svg:height="20.331cm" draw:z-index="0"><draw:image xlink:href="Pictures/100000010000057C00000808898EB195.png" xlink:type="simple" xlink:show="embed" xlink:actuate="onLoad" draw:mime-type="image/png"/></draw:frame></text:p>
      <text:h text:style-name="Heading_20_1" text:outline-level="1"><text:bookmark text:name="_mcp_b82cb9da"/><text:bookmark-start text:name="logging-configuration"/><text:bookmark-start text:name="__RefHeading___Toc8665_3058386561"/><text:soft-page-break/>Logging Configuration<text:bookmark-end text:name="logging-configuration"/><text:bookmark-end text:name="__RefHeading___Toc8665_3058386561"/></text:h>
      <text:p text:style-name="Text_20_body"><text:span text:style-name="T1">File:</text:span> <text:span text:style-name="Source_20_Text">logging.properties</text:span></text:p>
      <text:list text:style-name="L45">
        <text:list-item>
          <text:p text:style-name="P91">Default log level: <text:span text:style-name="Source_20_Text"><text:span text:style-name="T12">WARN</text:span></text:span></text:p>
        </text:list-item>
        <text:list-item>
          <text:p text:style-name="P91">Console handler: <text:span text:style-name="Source_20_Text">java.util.logging.ConsoleHandler</text:span> with <text:span text:style-name="Source_20_Text">jacamo.util.LogFormatter</text:span></text:p>
        </text:list-item>
        <text:list-item>
          <text:p text:style-name="P91">File handler: Disabled by default; can be enabled by uncommenting the <text:span text:style-name="Source_20_Text">FileHandler</text:span> configuration (outputs to <text:span text:style-name="Source_5f_Text"><text:span text:style-name="T2">l</text:span></text:span><text:span text:style-name="Source_20_Text">og/mas-*.log</text:span>).</text:p>
        </text:list-item>
      </text:list>
      <text:h text:style-name="Heading_20_1" text:outline-level="1"><text:bookmark text:name="_mcp_32988fba"/><text:bookmark-start text:name="known-limitations"/><text:bookmark-start text:name="__RefHeading___Toc8669_3058386561"/>Known Limitations and Unimplemented Features<text:bookmark-end text:name="known-limitations"/><text:bookmark-end text:name="__RefHeading___Toc8669_3058386561"/></text:h>
      <text:list text:style-name="L46">
        <text:list-item>
          <text:p text:style-name="P92"><text:span text:style-name="T1">Siblings</text:span> – The <text:span text:style-name="Source_20_Text">max_siblings</text:span> configuration is parsed but <text:span text:style-name="Source_20_Text">addSiblingAgents()</text:span> is a no-op.</text:p>
        </text:list-item>
        <text:list-item>
          <text:p text:style-name="P92"><text:span text:style-name="T1">Single teacher</text:span> – The system supports exactly one teacher agent. Multiple classrooms are not supported.</text:p>
        </text:list-item>
        <text:list-item>
          <text:p text:style-name="P92"><text:span text:style-name="T1">Static word learning thresholds</text:span> – The learning criteria (&gt;20 or &gt;12+12) are hard-coded in <text:span text:style-name="Source_20_Text">child.asl</text:span>.</text:p>
        </text:list-item>
        <text:list-item>
          <text:p text:style-name="P92"><text:span text:style-name="T1">Static fields in artefacts</text:span> – All artefacts use <text:span text:style-name="Source_20_Text">static</text:span> fields, meaning only one instance of each artefact type can exist in the system.</text:p>
        </text:list-item>
        <text:list-item>
          <text:p text:style-name="P92"><text:span text:style-name="T1">No incremental output</text:span> – Results are only written at simulation end. A crash mid-simulation loses all data.</text:p>
        </text:list-item>
        <text:list-item>
          <text:p text:style-name="P92">Memory usage – Each child agent's word data is stored in its HashMapBB belief base (indexed by word), so large vocabularies with many agents can consume significant heap spac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keep-with-next="auto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3cm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Caption" style:class="extra"/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 fo:keep-with-next="always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de" style:family="paragraph" style:parent-style-name="Caption"/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.5pt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title>Child Vocabulary Acquisition Simulation – Codebase Description</dc:title>
    <dc:description/>
    <dc:subject/>
    <meta:keyword/>
    <meta:initial-creator/>
    <meta:creation-date>2026-03-06T00:22:19Z</meta:creation-date>
    <dc:date>2026-03-13T16:11:54.593463000</dc:date>
    <meta:editing-duration>PT2H39M56S</meta:editing-duration>
    <meta:editing-cycles>36</meta:editing-cycles>
    <meta:print-date>2026-03-06T12:41:59.635120000</meta:print-date>
    <meta:printed-by>PDF files</meta:printed-by>
    <meta:document-statistic meta:table-count="8" meta:image-count="2" meta:object-count="0" meta:page-count="16" meta:paragraph-count="574" meta:word-count="4255" meta:character-count="31894" meta:non-whitespace-character-count="28015"/>
    <meta:user-defined meta:name="subtitle">Developer Reference</meta:user-defined>
  </office:meta>
</office:document-meta>
</file>